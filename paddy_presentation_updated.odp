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00100000100000001005AEE8E6A.png" manifest:media-type="image/png"/>
  <manifest:file-entry manifest:full-path="Pictures/1000000100000780000004385AB9D59A.png" manifest:media-type="image/png"/>
  <manifest:file-entry manifest:full-path="Pictures/1000000100000100000001008662D2C1.png" manifest:media-type="image/png"/>
  <manifest:file-entry manifest:full-path="Pictures/100000010000078000000438FB6C897A.png" manifest:media-type="image/png"/>
  <manifest:file-entry manifest:full-path="Pictures/100000010000078000000438A793D2F9.png" manifest:media-type="image/png"/>
  <manifest:file-entry manifest:full-path="Pictures/1000000100000100000001000234FCF6.png" manifest:media-type="image/png"/>
  <manifest:file-entry manifest:full-path="Pictures/100000010000010000000100C1E81E21.png" manifest:media-type="image/png"/>
  <manifest:file-entry manifest:full-path="Pictures/100000010000010000000100E0EB5BCF.png" manifest:media-type="image/png"/>
  <manifest:file-entry manifest:full-path="Pictures/1000000100000100000001007440A46E.png" manifest:media-type="image/png"/>
  <manifest:file-entry manifest:full-path="Pictures/100000010000010000000100B03B6B68.png" manifest:media-type="image/png"/>
  <manifest:file-entry manifest:full-path="Pictures/100000010000025800000008FD70ED82.png" manifest:media-type="image/png"/>
  <manifest:file-entry manifest:full-path="Pictures/100000010000010000000100E377BA3D.png" manifest:media-type="image/png"/>
  <manifest:file-entry manifest:full-path="Pictures/10000001000000DA000000DCCA24EBB8.png" manifest:media-type="image/png"/>
  <manifest:file-entry manifest:full-path="Pictures/1000000100000100000001005FAF21AE.png" manifest:media-type="image/png"/>
  <manifest:file-entry manifest:full-path="Pictures/10000001000000E2000000E0D160AFA9.png" manifest:media-type="image/png"/>
  <manifest:file-entry manifest:full-path="Pictures/10000001000000DE000000E0EB185E2B.png" manifest:media-type="image/png"/>
  <manifest:file-entry manifest:full-path="Pictures/10000001000000DB000000DC0FD0F72E.png" manifest:media-type="image/png"/>
  <manifest:file-entry manifest:full-path="Pictures/10000001000000DB000000DFA9C7F90B.png" manifest:media-type="image/png"/>
  <manifest:file-entry manifest:full-path="Pictures/10000001000000DC000000DBEC2F56B9.png" manifest:media-type="image/png"/>
  <manifest:file-entry manifest:full-path="Pictures/10000001000000DE000000DC33516FB6.png" manifest:media-type="image/png"/>
  <manifest:file-entry manifest:full-path="Pictures/10000001000000E0000000DADC78B8C9.png" manifest:media-type="image/png"/>
  <manifest:file-entry manifest:full-path="Pictures/10000001000000DB000000DF2F6C9189.png" manifest:media-type="image/png"/>
  <manifest:file-entry manifest:full-path="Pictures/100000010000010000000100533A04F7.png" manifest:media-type="image/png"/>
  <manifest:file-entry manifest:full-path="Pictures/10000001000000DD000000DD8DD85A49.png" manifest:media-type="image/png"/>
  <manifest:file-entry manifest:full-path="Pictures/1000000100000100000001001D242044.png" manifest:media-type="image/png"/>
  <manifest:file-entry manifest:full-path="Pictures/10000001000001000000010035C63A27.png" manifest:media-type="image/png"/>
  <manifest:file-entry manifest:full-path="Pictures/100000010000010000000100E1C42482.png" manifest:media-type="image/png"/>
  <manifest:file-entry manifest:full-path="Pictures/TablePreview1.svm" manifest:media-type=""/>
  <manifest:file-entry manifest:full-path="Pictures/10000001000001000000010093A406A4.png" manifest:media-type="image/png"/>
  <manifest:file-entry manifest:full-path="Pictures/1000000100000100000001005ACCC37B.png" manifest:media-type="image/png"/>
  <manifest:file-entry manifest:full-path="Pictures/100000010000010000000100542179C8.png" manifest:media-type="image/png"/>
  <manifest:file-entry manifest:full-path="Pictures/1000000100000100000001007A1D978B.png" manifest:media-type="image/png"/>
  <manifest:file-entry manifest:full-path="Pictures/100000010000010000000100AB9FDB8E.png" manifest:media-type="image/png"/>
  <manifest:file-entry manifest:full-path="Pictures/100000010000010000000100B9A4B818.png" manifest:media-type="image/png"/>
  <manifest:file-entry manifest:full-path="Pictures/100000010000010000000100541F4388.png" manifest:media-type="image/png"/>
  <manifest:file-entry manifest:full-path="Pictures/100000010000010000000100BD203286.png" manifest:media-type="image/png"/>
  <manifest:file-entry manifest:full-path="Pictures/10000001000001000000010096DD768A.png" manifest:media-type="image/png"/>
  <manifest:file-entry manifest:full-path="Pictures/1000000100000100000001000A86BA5C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modern" style:font-pitch="fixed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solid" draw:fill-color="#1a1f2e" presentation:display-footer="false" presentation:display-page-number="false" presentation:display-date-time="false"/>
    </style:style>
    <style:style style:name="dp14" style:family="drawing-page">
      <style:drawing-page-properties presentation:display-header="true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2" style:family="graphic" style:parent-style-name="standard">
      <style:graphic-properties draw:stroke="none" svg:stroke-width="0cm" draw:fill="solid" draw:fill-color="#00b4d8" draw:opacity="8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solid" draw:fill-color="#00f5a0" draw:opacity="6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905cm" fo:min-width="21.3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1c2333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12" style:family="graphic" style:parent-style-name="standard">
      <style:graphic-properties draw:stroke="none" svg:stroke-width="0cm" draw:fill="solid" draw:fill-color="#00b4d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00f5a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f59e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1a1f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1c2333" draw:textarea-vertical-align="top" draw:auto-grow-height="false" fo:min-height="3.687cm" fo:min-width="3.513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="solid" draw:fill-color="#0ea5e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cm" draw:fill="solid" draw:fill-color="#8b949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solid" draw:fill-color="#4a5568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solid" draw:fill-color="#3b5998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width="0cm" draw:fill="solid" draw:fill-color="#2563e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solid" draw:fill-color="#0ea5e9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width="0cm" draw:fill="solid" draw:fill-color="#06b6d4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solid" draw:fill-color="#059669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width="0cm" draw:fill="solid" draw:fill-color="#10b981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353cm" loext:decorative="false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width="0cm" draw:fill="solid" draw:fill-color="#1c233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="solid" draw:fill-color="#ef444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none" svg:stroke-width="0cm" draw:fill="solid" draw:fill-color="#ef4444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cm" draw:fill="solid" draw:fill-color="#f59e0b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svg:stroke-width="0cm" draw:fill="solid" draw:fill-color="#00f5a0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>
      <style:graphic-properties draw:stroke="none" svg:stroke-width="0cm" draw:fill="solid" draw:fill-color="#0f162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>
      <style:graphic-properties draw:stroke="none" svg:stroke-width="0cm" draw:fill="solid" draw:fill-color="#a78bf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2" style:family="graphic" style:parent-style-name="standard">
      <style:graphic-properties draw:stroke="none" svg:stroke-width="0cm" draw:fill="solid" draw:fill-color="#1c2333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2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2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7" style:family="graphic" style:parent-style-name="standard">
      <style:graphic-properties loext:decorative="false"/>
    </style:style>
    <style:style style:name="gr2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2" style:family="graphic" style:parent-style-name="standard" style:list-style-name="L11">
      <style:graphic-properties draw:stroke="none" svg:stroke-width="0cm" draw:fill="solid" draw:fill-color="#00b4d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5" style:family="graphic" style:parent-style-name="standard" style:list-style-name="L11">
      <style:graphic-properties draw:stroke="none" svg:stroke-width="0cm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11">
      <style:graphic-properties draw:stroke="none" svg:stroke-width="0cm" draw:fill="solid" draw:fill-color="#a78bf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5" style:family="graphic" style:parent-style-name="standard">
      <style:graphic-properties draw:stroke="none" svg:stroke-width="0cm" draw:fill="solid" draw:fill-color="#00b4d8" draw:opacity="4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1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35cm" style:use-optimal-column-width="false"/>
    </style:style>
    <style:style style:name="co2" style:family="table-column">
      <style:table-column-properties style:column-width="8.636cm" style:use-optimal-column-width="false"/>
    </style:style>
    <style:style style:name="ro1" style:family="table-row">
      <style:table-row-properties style:row-height="0.889cm" style:use-optimal-row-height="false"/>
    </style:style>
    <style:style style:name="ce1" style:family="table-cell">
      <loext:graphic-properties draw:fill="solid" draw:fill-color="#00b4d8" draw:textarea-vertical-align="top" fo:padding-top="0.127cm" fo:padding-bottom="0.127cm" fo:padding-left="0.254cm" fo:padding-right="0.254cm"/>
      <style:paragraph-properties fo:border="0.26pt solid #2a3040" style:font-independent-line-spacing="true"/>
    </style:style>
    <style:style style:name="ce2" style:family="table-cell">
      <loext:graphic-properties draw:fill="solid" draw:fill-color="#1c2333" draw:textarea-vertical-align="top" fo:padding-top="0.127cm" fo:padding-bottom="0.127cm" fo:padding-left="0.254cm" fo:padding-right="0.254cm"/>
      <style:paragraph-properties fo:border="0.26pt solid #2a3040" style:font-independent-line-spacing="true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P2" style:family="paragraph">
      <loext:graphic-properties draw:fill="solid" draw:fill-color="#00b4d8" draw:opacity="8%"/>
      <style:paragraph-properties fo:text-align="left"/>
      <style:text-properties fo:font-size="18pt"/>
    </style:style>
    <style:style style:name="P3" style:family="paragraph">
      <loext:graphic-properties draw:fill="solid" draw:fill-color="#00f5a0" draw:opacity="6%"/>
      <style:paragraph-properties fo:text-align="lef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1c2333"/>
      <style:paragraph-properties fo:text-align="left"/>
      <style:text-properties fo:font-size="18pt"/>
    </style:style>
    <style:style style:name="P13" style:family="paragraph">
      <loext:graphic-properties draw:fill="solid" draw:fill-color="#00b4d8"/>
      <style:paragraph-properties fo:text-align="left"/>
      <style:text-properties fo:font-size="18pt"/>
    </style:style>
    <style:style style:name="P14" style:family="paragraph">
      <loext:graphic-properties draw:fill="solid" draw:fill-color="#00f5a0"/>
      <style:paragraph-properties fo:text-align="left"/>
      <style:text-properties fo:font-size="18pt"/>
    </style:style>
    <style:style style:name="P15" style:family="paragraph">
      <loext:graphic-properties draw:fill="solid" draw:fill-color="#f59e0b"/>
      <style:paragraph-properties fo:text-align="left"/>
      <style:text-properties fo:font-size="18pt"/>
    </style:style>
    <style:style style:name="P16" style:family="paragraph"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1a1f2e"/>
      <style:paragraph-properties fo:text-align="left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0ea5e9"/>
      <style:paragraph-properties fo:text-align="left"/>
      <style:text-properties fo:font-size="18pt"/>
    </style:style>
    <style:style style:name="P20" style:family="paragraph">
      <loext:graphic-properties draw:fill="solid" draw:fill-color="#8b949e"/>
      <style:paragraph-properties fo:text-align="left"/>
      <style:text-properties fo:font-size="18pt"/>
    </style:style>
    <style:style style:name="P21" style:family="paragraph">
      <loext:graphic-properties draw:fill="solid" draw:fill-color="#4a5568"/>
      <style:paragraph-properties fo:text-align="left"/>
      <style:text-properties fo:font-size="18pt"/>
    </style:style>
    <style:style style:name="P22" style:family="paragraph">
      <loext:graphic-properties draw:fill="solid" draw:fill-color="#3b5998"/>
      <style:paragraph-properties fo:text-align="left"/>
      <style:text-properties fo:font-size="18pt"/>
    </style:style>
    <style:style style:name="P23" style:family="paragraph">
      <loext:graphic-properties draw:fill="solid" draw:fill-color="#2563eb"/>
      <style:paragraph-properties fo:text-align="left"/>
      <style:text-properties fo:font-size="18pt"/>
    </style:style>
    <style:style style:name="P24" style:family="paragraph">
      <loext:graphic-properties draw:fill="solid" draw:fill-color="#06b6d4"/>
      <style:paragraph-properties fo:text-align="left"/>
      <style:text-properties fo:font-size="18pt"/>
    </style:style>
    <style:style style:name="P25" style:family="paragraph">
      <loext:graphic-properties draw:fill="solid" draw:fill-color="#059669"/>
      <style:paragraph-properties fo:text-align="left"/>
      <style:text-properties fo:font-size="18pt"/>
    </style:style>
    <style:style style:name="P26" style:family="paragraph">
      <loext:graphic-properties draw:fill="solid" draw:fill-color="#10b981"/>
      <style:paragraph-properties fo:text-align="left"/>
      <style:text-properties fo:font-size="18pt"/>
    </style:style>
    <style:style style:name="P27" style:family="paragraph">
      <loext:graphic-properties draw:fill="solid" draw:fill-color="#ef4444"/>
      <style:paragraph-properties fo:text-align="left"/>
      <style:text-properties fo:font-size="18pt"/>
    </style:style>
    <style:style style:name="P28" style:family="paragraph">
      <loext:graphic-properties draw:fill="solid" draw:fill-color="#ef4444" draw:opacity="20%"/>
      <style:paragraph-properties fo:text-align="left"/>
      <style:text-properties fo:font-size="18pt"/>
    </style:style>
    <style:style style:name="P29" style:family="paragraph">
      <loext:graphic-properties draw:fill="solid" draw:fill-color="#f59e0b" draw:opacity="20%"/>
      <style:paragraph-properties fo:text-align="left"/>
      <style:text-properties fo:font-size="18pt"/>
    </style:style>
    <style:style style:name="P30" style:family="paragraph">
      <loext:graphic-properties draw:fill="solid" draw:fill-color="#00f5a0" draw:opacity="20%"/>
      <style:paragraph-properties fo:text-align="left"/>
      <style:text-properties fo:font-size="18pt"/>
    </style:style>
    <style:style style:name="P31" style:family="paragraph">
      <loext:graphic-properties draw:fill="solid" draw:fill-color="#0f1620"/>
      <style:paragraph-properties fo:text-align="left"/>
      <style:text-properties fo:font-size="18pt"/>
    </style:style>
    <style:style style:name="P32" style:family="paragraph">
      <loext:graphic-properties draw:fill="solid" draw:fill-color="#a78bfa"/>
      <style:paragraph-properties fo:text-align="left"/>
      <style:text-properties fo:font-size="18pt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00b4d8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.141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.141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solid" draw:fill-color="#f59e0b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a78bfa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00b4d8" draw:opacity="4%"/>
      <style:paragraph-properties fo:text-align="left"/>
      <style:text-properties fo:font-size="18pt"/>
    </style:style>
    <style:style style:name="T1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bold" fo:background-color="transparent" style:font-name-asian="Trebuchet MS1" style:font-size-asian="36pt" style:font-style-asian="normal" style:font-weight-asian="bold" style:font-name-complex="Trebuchet MS" style:font-size-complex="36pt" style:font-style-complex="normal" style:font-weight-complex="bold"/>
    </style:style>
    <style:style style:name="T2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Calibri Light" fo:font-size="26pt" fo:letter-spacing="normal" fo:language="en" fo:country="US" fo:font-style="normal" style:text-underline-style="none" fo:font-weight="normal" fo:background-color="transparent" style:font-name-asian="Calibri Light1" style:font-size-asian="26pt" style:font-style-asian="normal" style:font-weight-asian="normal" style:font-name-complex="Calibri Light" style:font-size-complex="26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name-asian="Trebuchet MS1" style:font-size-asian="32pt" style:font-style-asian="normal" style:font-weight-asian="bold" style:font-name-complex="Trebuchet MS" style:font-size-complex="32pt" style:font-style-complex="normal" style:font-weight-complex="bold"/>
    </style:style>
    <style:style style:name="T7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15pt" fo:letter-spacing="normal" fo:language="en" fo:country="US" fo:font-style="normal" style:text-underline-style="none" fo:font-weight="bold" fo:background-color="transparent" style:font-name-asian="Trebuchet MS1" style:font-size-asian="15pt" style:font-style-asian="normal" style:font-weight-asian="bold" style:font-name-complex="Trebuchet MS" style:font-size-complex="15pt" style:font-style-complex="normal" style:font-weight-complex="bold"/>
    </style:style>
    <style:style style:name="T8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10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11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2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3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bold" fo:background-color="transparent" style:font-name-asian="Trebuchet MS1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T14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9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bold" fo:background-color="transparent" style:font-name-asian="Trebuchet MS1" style:font-size-asian="22pt" style:font-style-asian="normal" style:font-weight-asian="bold" style:font-name-complex="Trebuchet MS" style:font-size-complex="22pt" style:font-style-complex="normal" style:font-weight-complex="bold"/>
    </style:style>
    <style:style style:name="T20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name-asian="Trebuchet MS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21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name-asian="Trebuchet MS1" style:font-size-asian="32pt" style:font-style-asian="normal" style:font-weight-asian="bold" style:font-name-complex="Trebuchet MS" style:font-size-complex="32pt" style:font-style-complex="normal" style:font-weight-complex="bold"/>
    </style:style>
    <style:style style:name="T22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23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name-asian="Trebuchet MS1" style:font-size-asian="32pt" style:font-style-asian="normal" style:font-weight-asian="bold" style:font-name-complex="Trebuchet MS" style:font-size-complex="32pt" style:font-style-complex="normal" style:font-weight-complex="bold"/>
    </style:style>
    <style:style style:name="T24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25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name-asian="Trebuchet MS1" style:font-size-asian="32pt" style:font-style-asian="normal" style:font-weight-asian="bold" style:font-name-complex="Trebuchet MS" style:font-size-complex="32pt" style:font-style-complex="normal" style:font-weight-complex="bold"/>
    </style:style>
    <style:style style:name="T26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27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30pt" fo:letter-spacing="normal" fo:language="en" fo:country="US" fo:font-style="normal" style:text-underline-style="none" fo:font-weight="bold" fo:background-color="transparent" style:font-name-asian="Trebuchet MS1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T28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name-asian="Trebuchet MS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29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Trebuchet MS" fo:font-size="34pt" fo:letter-spacing="normal" fo:language="en" fo:country="US" fo:font-style="normal" style:text-underline-style="none" fo:font-weight="bold" fo:background-color="transparent" style:font-name-asian="Trebuchet MS1" style:font-size-asian="34pt" style:font-style-asian="normal" style:font-weight-asian="bold" style:font-name-complex="Trebuchet MS" style:font-size-complex="34pt" style:font-style-complex="normal" style:font-weight-complex="bold"/>
    </style:style>
    <style:style style:name="T30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31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32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33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" fo:font-size="9pt" fo:letter-spacing="normal" fo:language="en" fo:country="US" fo:font-style="italic" style:text-underline-style="none" fo:font-weight="normal" fo:background-color="transparent" style:font-name-asian="Calibri2" style:font-size-asian="9pt" style:font-style-asian="italic" style:font-weight-asian="normal" style:font-name-complex="Calibri" style:font-size-complex="9pt" style:font-style-complex="italic" style:font-weight-complex="normal"/>
    </style:style>
    <style:style style:name="T34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name-asian="Trebuchet MS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35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Trebuchet MS" fo:font-size="34pt" fo:letter-spacing="normal" fo:language="en" fo:country="US" fo:font-style="normal" style:text-underline-style="none" fo:font-weight="bold" fo:background-color="transparent" style:font-name-asian="Trebuchet MS1" style:font-size-asian="34pt" style:font-style-asian="normal" style:font-weight-asian="bold" style:font-name-complex="Trebuchet MS" style:font-size-complex="34pt" style:font-style-complex="normal" style:font-weight-complex="bold"/>
    </style:style>
    <style:style style:name="T36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37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name-asian="Trebuchet MS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38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Trebuchet MS" fo:font-size="34pt" fo:letter-spacing="normal" fo:language="en" fo:country="US" fo:font-style="normal" style:text-underline-style="none" fo:font-weight="bold" fo:background-color="transparent" style:font-name-asian="Trebuchet MS1" style:font-size-asian="34pt" style:font-style-asian="normal" style:font-weight-asian="bold" style:font-name-complex="Trebuchet MS" style:font-size-complex="34pt" style:font-style-complex="normal" style:font-weight-complex="bold"/>
    </style:style>
    <style:style style:name="T39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40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13pt" fo:letter-spacing="normal" fo:language="en" fo:country="US" fo:font-style="normal" style:text-underline-style="none" fo:font-weight="bold" fo:background-color="transparent" style:font-name-asian="Trebuchet MS1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T41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Trebuchet MS" fo:font-size="64pt" fo:letter-spacing="normal" fo:language="en" fo:country="US" fo:font-style="normal" style:text-underline-style="none" fo:font-weight="bold" fo:background-color="transparent" style:font-name-asian="Trebuchet MS1" style:font-size-asian="64pt" style:font-style-asian="normal" style:font-weight-asian="bold" style:font-name-complex="Trebuchet MS" style:font-size-complex="64pt" style:font-style-complex="normal" style:font-weight-complex="bold"/>
    </style:style>
    <style:style style:name="T42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43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4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bold" fo:background-color="transparent" style:font-name-asian="Trebuchet MS1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45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46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bold" fo:background-color="transparent" style:font-name-asian="Trebuchet MS1" style:font-size-asian="22pt" style:font-style-asian="normal" style:font-weight-asian="bold" style:font-name-complex="Trebuchet MS" style:font-size-complex="22pt" style:font-style-complex="normal" style:font-weight-complex="bold"/>
    </style:style>
    <style:style style:name="T47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bold" fo:background-color="transparent" style:font-name-asian="Trebuchet MS1" style:font-size-asian="22pt" style:font-style-asian="normal" style:font-weight-asian="bold" style:font-name-complex="Trebuchet MS" style:font-size-complex="22pt" style:font-style-complex="normal" style:font-weight-complex="bold"/>
    </style:style>
    <style:style style:name="T48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bold" fo:background-color="transparent" style:font-name-asian="Trebuchet MS1" style:font-size-asian="22pt" style:font-style-asian="normal" style:font-weight-asian="bold" style:font-name-complex="Trebuchet MS" style:font-size-complex="22pt" style:font-style-complex="normal" style:font-weight-complex="bold"/>
    </style:style>
    <style:style style:name="T49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28pt" fo:letter-spacing="normal" fo:language="en" fo:country="US" fo:font-style="normal" style:text-underline-style="none" fo:font-weight="bold" fo:background-color="transparent" style:font-name-asian="Trebuchet MS1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50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52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54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5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bold" fo:background-color="transparent" style:font-name-asian="Trebuchet MS1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56" style:family="text">
      <style:text-properties fo:font-variant="normal" fo:text-transform="none" fo:color="#1a1f2e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57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bold" fo:background-color="transparent" style:font-name-asian="Trebuchet MS1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58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bold" fo:background-color="transparent" style:font-name-asian="Trebuchet MS1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59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name-asian="Trebuchet MS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60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bold" fo:background-color="transparent" style:font-name-asian="Trebuchet MS1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T61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62" style:family="text">
      <style:text-properties fo:font-variant="normal" fo:text-transform="none" fo:color="#0ea5e9" loext:opacity="100%" style:text-outline="false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bold" fo:background-color="transparent" style:font-name-asian="Trebuchet MS1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T63" style:family="text">
      <style:text-properties fo:font-variant="normal" fo:text-transform="none" fo:color="#00f5a0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64" style:family="text">
      <style:text-properties fo:font-variant="normal" fo:text-transform="none" fo:color="#e6edf3" loext:opacity="100%" style:text-outline="false" style:text-line-through-style="none" style:text-line-through-type="none" style:text-position="0% 100%" style:font-name="Trebuchet MS" fo:font-size="44pt" fo:letter-spacing="normal" fo:language="en" fo:country="US" fo:font-style="normal" style:text-underline-style="none" fo:font-weight="bold" fo:background-color="transparent" style:font-name-asian="Trebuchet MS1" style:font-size-asian="44pt" style:font-style-asian="normal" style:font-weight-asian="bold" style:font-name-complex="Trebuchet MS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6edf3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b4d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949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f5a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ea5e9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a78bf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1a1f2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Image 0" draw:style-name="gr1" draw:text-style-name="P1" draw:layer="layout" svg:width="25.399cm" svg:height="14.287cm" svg:x="0.001cm" svg:y="-0.317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15.239cm" svg:height="15.239cm" svg:x="-5.08cm" svg:y="-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" draw:text-style-name="P3" draw:layer="layout" svg:width="12.699cm" svg:height="12.699cm" svg:x="15.24cm" svg:y="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4" draw:text-style-name="P1" draw:layer="layout" svg:width="2.285cm" svg:height="2.285cm" svg:x="11.557cm" svg:y="1.524cm">
          <draw:image xlink:href="Pictures/100000010000010000000100E0EB5BCF.png" xlink:type="simple" xlink:show="embed" xlink:actuate="onLoad" draw:mime-type="image/png">
            <text:p/>
          </draw:image>
          <svg:desc>preencoded.png</svg:desc>
        </draw:frame>
        <draw:custom-shape draw:name="Text 2" draw:style-name="gr5" draw:text-style-name="P5" draw:layer="layout" svg:width="21.335cm" svg:height="1.523cm" svg:x="2.032cm" svg:y="3.81cm">
          <text:p text:style-name="P4"><text:span text:style-name="T1">Paddy Disease Classif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" draw:text-style-name="P5" draw:layer="layout" svg:width="21.335cm" svg:height="1.396cm" svg:x="2.032cm" svg:y="5.461cm">
          <text:p text:style-name="P4"><text:span text:style-name="T2">Using Transfer Lear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0.159cm" svg:height="0.126cm" svg:x="7.62cm" svg:y="7.366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Text 4" draw:style-name="gr7" draw:text-style-name="P5" draw:layer="layout" svg:width="17.779cm" svg:height="1.269cm" svg:x="3.81cm" svg:y="8.001cm">
          <text:p text:style-name="P6"><text:span text:style-name="T3">Mentor :- Dr. Durgesh Sing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" draw:text-style-name="P5" draw:layer="layout" svg:width="21.335cm" svg:height="1.904cm" svg:x="2.032cm" svg:y="10.795cm">
          <text:p text:style-name="P4"><text:span text:style-name="T4"/></text:p>
          <text:p text:style-name="P4"><text:span text:style-name="T4">Team :- <text:s/>T Revan Kumar</text:span></text:p>
          <text:p text:style-name="P4"><text:span text:style-name="T4"><text:s/>Arshad</text:span></text:p>
          <text:p text:style-name="P4"><text:span text:style-name="T4"><text:s text:c="16"/>N Pranay Reddy</text:span></text:p>
          <text:p text:style-name="P4"><text:span text:style-name="T4"><text:s text:c="10"/>Siva Ganesh</text:span></text:p>
          <text:p text:style-name="P4"><text:span text:style-name="T4">Rishika</text:span></text:p>
          <text:p text:style-name="P4"><text:span text:style-name="T4"><text:s/>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10" draw:text-style-name="P11" draw:layer="layout" svg:width="20.319cm" svg:height="1.523cm" svg:x="1.778cm" svg:y="0.889cm">
          <text:p text:style-name="P10"><text:span text:style-name="T6">Problem Statem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7.111cm" svg:height="7.111cm" svg:x="1.778cm" svg:y="3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2" draw:text-style-name="P13" draw:layer="layout" svg:width="7.111cm" svg:height="0.151cm" svg:x="1.778cm" svg:y="3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777cm" svg:height="1.777cm" svg:x="4.445cm" svg:y="4.445cm">
          <draw:image xlink:href="Pictures/100000010000010000000100E377BA3D.png" xlink:type="simple" xlink:show="embed" xlink:actuate="onLoad" draw:mime-type="image/png">
            <text:p/>
          </draw:image>
          <svg:desc>preencoded.png</svg:desc>
        </draw:frame>
        <draw:custom-shape draw:name="Text 3" draw:style-name="gr13" draw:text-style-name="P5" draw:layer="layout" svg:width="6.349cm" svg:height="1.015cm" svg:x="2.159cm" svg:y="6.477cm">
          <text:p text:style-name="P4"><text:span text:style-name="T7">10 Disease 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5" draw:layer="layout" svg:width="6.349cm" svg:height="2.285cm" svg:x="2.159cm" svg:y="7.62cm">
          <text:p text:style-name="P4"><text:span text:style-name="T8">~10,000 images from Kaggle</text:span></text:p>
          <text:p text:style-name="P4"><text:span text:style-name="T8">paddy disease datase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1" draw:text-style-name="P12" draw:layer="layout" svg:width="7.111cm" svg:height="7.111cm" svg:x="9.525cm" svg:y="3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5" draw:text-style-name="P14" draw:layer="layout" svg:width="7.111cm" svg:height="0.151cm" svg:x="9.525cm" svg:y="3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1.777cm" svg:height="1.777cm" svg:x="12.192cm" svg:y="4.445cm">
          <draw:image xlink:href="Pictures/100000010000010000000100E0EB5BCF.png" xlink:type="simple" xlink:show="embed" xlink:actuate="onLoad" draw:mime-type="image/png">
            <text:p/>
          </draw:image>
          <svg:desc>preencoded.png</svg:desc>
        </draw:frame>
        <draw:custom-shape draw:name="Text 7" draw:style-name="gr16" draw:text-style-name="P5" draw:layer="layout" svg:width="6.349cm" svg:height="1.015cm" svg:x="9.906cm" svg:y="6.477cm">
          <text:p text:style-name="P4"><text:span text:style-name="T7">Agricultural Impac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" draw:text-style-name="P5" draw:layer="layout" svg:width="6.349cm" svg:height="2.285cm" svg:x="9.906cm" svg:y="7.62cm">
          <text:p text:style-name="P4"><text:span text:style-name="T8">Build accurate classifier for</text:span></text:p>
          <text:p text:style-name="P4"><text:span text:style-name="T8">real-world crop disease dete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1" draw:text-style-name="P12" draw:layer="layout" svg:width="7.111cm" svg:height="7.111cm" svg:x="17.272cm" svg:y="3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8" draw:text-style-name="P15" draw:layer="layout" svg:width="7.111cm" svg:height="0.151cm" svg:x="17.272cm" svg:y="3.55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1" draw:layer="layout" svg:width="1.777cm" svg:height="1.777cm" svg:x="19.939cm" svg:y="4.445cm">
          <draw:image xlink:href="Pictures/1000000100000100000001005FAF21AE.png" xlink:type="simple" xlink:show="embed" xlink:actuate="onLoad" draw:mime-type="image/png">
            <text:p/>
          </draw:image>
          <svg:desc>preencoded.png</svg:desc>
        </draw:frame>
        <draw:custom-shape draw:name="Text 11" draw:style-name="gr19" draw:text-style-name="P5" draw:layer="layout" svg:width="6.349cm" svg:height="1.015cm" svg:x="17.653cm" svg:y="6.477cm">
          <text:p text:style-name="P4"><text:span text:style-name="T7">Real World Impac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0" draw:text-style-name="P5" draw:layer="layout" svg:width="6.349cm" svg:height="2.285cm" svg:x="17.653cm" svg:y="7.62cm">
          <text:p text:style-name="P16"><text:span text:style-name="T8">Early disease detection can save up to 40% crop loss in paddy farming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17" draw:layer="layout" svg:width="21.843cm" svg:height="1.523cm" svg:x="1.778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2" draw:text-style-name="P11" draw:layer="layout" svg:width="20.827cm" svg:height="1.523cm" svg:x="2.286cm" svg:y="11.557cm">
          <text:p text:style-name="P10"><text:span text:style-name="T9">Challenge: Predict disease correct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2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4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23" draw:text-style-name="P11" draw:layer="layout" svg:width="20.319cm" svg:height="1.523cm" svg:x="1.778cm" svg:y="0.889cm">
          <text:p text:style-name="P10"><text:span text:style-name="T6">Dataset Overvie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24" draw:text-style-name="P12" draw:layer="layout" svg:width="4.012cm" svg:height="3.936cm" svg:x="1.778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269cm" svg:height="1.269cm" svg:x="3.15cm" svg:y="3.81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3" draw:style-name="gr25" draw:text-style-name="P5" draw:layer="layout" svg:width="3.758cm" svg:height="1.015cm" svg:x="1.905cm" svg:y="5.842cm">
          <text:p text:style-name="P4"><text:span text:style-name="T10"/></text:p>
          <text:p text:style-name="P4"><text:span text:style-name="T10"/></text:p>
          <text:p text:style-name="P4"><text:span text:style-name="T10">Bacterial Leaf Bl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1" draw:text-style-name="P12" draw:layer="layout" svg:width="4.012cm" svg:height="3.936cm" svg:x="6.299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1.269cm" svg:height="1.269cm" svg:x="7.671cm" svg:y="3.81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6" draw:style-name="gr26" draw:text-style-name="P5" draw:layer="layout" svg:width="3.758cm" svg:height="1.015cm" svg:x="6.426cm" svg:y="5.842cm">
          <text:p text:style-name="P4"><text:span text:style-name="T10"/></text:p>
          <text:p text:style-name="P4"><text:span text:style-name="T10"/></text:p>
          <text:p text:style-name="P4"><text:span text:style-name="T10">Brown Sp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1" draw:text-style-name="P12" draw:layer="layout" svg:width="4.012cm" svg:height="3.936cm" svg:x="10.82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1" draw:layer="layout" svg:width="1.269cm" svg:height="1.269cm" svg:x="12.192cm" svg:y="3.81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9" draw:style-name="gr27" draw:text-style-name="P5" draw:layer="layout" svg:width="3.758cm" svg:height="1.015cm" svg:x="10.947cm" svg:y="5.842cm">
          <text:p text:style-name="P4"><text:span text:style-name="T10"/></text:p>
          <text:p text:style-name="P4"><text:span text:style-name="T10"/></text:p>
          <text:p text:style-name="P4"><text:span text:style-name="T10">Bla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1" draw:text-style-name="P12" draw:layer="layout" svg:width="4.012cm" svg:height="3.936cm" svg:x="15.342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1" draw:layer="layout" svg:width="1.269cm" svg:height="1.269cm" svg:x="16.713cm" svg:y="3.81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12" draw:style-name="gr28" draw:text-style-name="P5" draw:layer="layout" svg:width="3.758cm" svg:height="1.015cm" svg:x="15.469cm" svg:y="5.842cm">
          <text:p text:style-name="P4"><text:span text:style-name="T10"/></text:p>
          <text:p text:style-name="P4"><text:span text:style-name="T10"/></text:p>
          <text:p text:style-name="P4"><text:span text:style-name="T10">Dead Hea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" draw:text-style-name="P12" draw:layer="layout" svg:width="4.012cm" svg:height="3.936cm" svg:x="19.863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" draw:text-style-name="P1" draw:layer="layout" svg:width="1.269cm" svg:height="1.269cm" svg:x="21.234cm" svg:y="3.81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15" draw:style-name="gr29" draw:text-style-name="P5" draw:layer="layout" svg:width="3.758cm" svg:height="1.015cm" svg:x="19.99cm" svg:y="5.842cm">
          <text:p text:style-name="P4"><text:span text:style-name="T10"/></text:p>
          <text:p text:style-name="P4"><text:span text:style-name="T10"/></text:p>
          <text:p text:style-name="P4"><text:span text:style-name="T10">Hisp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12" draw:layer="layout" svg:width="4.012cm" svg:height="3.936cm" svg:x="1.778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4" draw:text-style-name="P1" draw:layer="layout" svg:width="1.269cm" svg:height="1.269cm" svg:x="3.15cm" svg:y="8.382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18" draw:style-name="gr30" draw:text-style-name="P5" draw:layer="layout" svg:width="3.758cm" svg:height="1.015cm" svg:x="1.905cm" svg:y="10.414cm">
          <text:p text:style-name="P4"><text:span text:style-name="T10"/></text:p>
          <text:p text:style-name="P4"><text:span text:style-name="T10"/></text:p>
          <text:p text:style-name="P4"><text:span text:style-name="T10">Leaf Scal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1" draw:text-style-name="P12" draw:layer="layout" svg:width="4.012cm" svg:height="3.936cm" svg:x="6.299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4" draw:text-style-name="P1" draw:layer="layout" svg:width="1.269cm" svg:height="1.269cm" svg:x="7.671cm" svg:y="8.382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21" draw:style-name="gr31" draw:text-style-name="P5" draw:layer="layout" svg:width="3.758cm" svg:height="1.015cm" svg:x="6.426cm" svg:y="10.414cm">
          <text:p text:style-name="P4"><text:span text:style-name="T10"/></text:p>
          <text:p text:style-name="P4"><text:span text:style-name="T10"/></text:p>
          <text:p text:style-name="P4"><text:span text:style-name="T10">Narrow Brown Sp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1" draw:text-style-name="P12" draw:layer="layout" svg:width="4.012cm" svg:height="3.936cm" svg:x="10.82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2" draw:text-style-name="P5" draw:layer="layout" svg:width="3.758cm" svg:height="1.015cm" svg:x="10.947cm" svg:y="10.414cm">
          <text:p text:style-name="P4"><text:span text:style-name="T10"/></text:p>
          <text:p text:style-name="P4"><text:span text:style-name="T10"/></text:p>
          <text:p text:style-name="P4"><text:span text:style-name="T10">Norm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1" draw:text-style-name="P12" draw:layer="layout" svg:width="4.012cm" svg:height="3.936cm" svg:x="15.342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4" draw:text-style-name="P1" draw:layer="layout" svg:width="1.269cm" svg:height="1.269cm" svg:x="16.713cm" svg:y="8.382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27" draw:style-name="gr33" draw:text-style-name="P5" draw:layer="layout" svg:width="3.758cm" svg:height="1.015cm" svg:x="15.469cm" svg:y="10.414cm">
          <text:p text:style-name="P4"><text:span text:style-name="T10"/></text:p>
          <text:p text:style-name="P4"><text:span text:style-name="T10"/></text:p>
          <text:p text:style-name="P4"><text:span text:style-name="T10">Sheath Bl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1" draw:text-style-name="P12" draw:layer="layout" svg:width="4.012cm" svg:height="3.936cm" svg:x="19.863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4" draw:text-style-name="P1" draw:layer="layout" svg:width="1.269cm" svg:height="1.269cm" svg:x="21.234cm" svg:y="8.382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30" draw:style-name="gr34" draw:text-style-name="P5" draw:layer="layout" svg:width="3.758cm" svg:height="1.015cm" svg:x="19.99cm" svg:y="10.414cm">
          <text:p text:style-name="P4"><text:span text:style-name="T10"/></text:p>
          <text:p text:style-name="P4"><text:span text:style-name="T10"/></text:p>
          <text:p text:style-name="P4"><text:span text:style-name="T10">Tungr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1" draw:text-style-name="P17" draw:layer="layout" svg:width="21.843cm" svg:height="1.269cm" svg:x="1.778cm" svg:y="12.3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5" draw:text-style-name="P5" draw:layer="layout" svg:width="4.368cm" svg:height="1.269cm" svg:x="1.778cm" svg:y="12.319cm">
          <text:p text:style-name="P4"><text:span text:style-name="T11">~10,000 <text:s/></text:span><text:span text:style-name="T12">Im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6" draw:text-style-name="P5" draw:layer="layout" svg:width="4.368cm" svg:height="1.269cm" svg:x="6.147cm" svg:y="12.319cm">
          <text:p text:style-name="P4"><text:span text:style-name="T11">10 <text:s/></text:span><text:span text:style-name="T12">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7" draw:text-style-name="P5" draw:layer="layout" svg:width="4.368cm" svg:height="1.269cm" svg:x="10.516cm" svg:y="12.319cm">
          <text:p text:style-name="P4"><text:span text:style-name="T11">80/20 <text:s/></text:span><text:span text:style-name="T12">Spl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38" draw:text-style-name="P5" draw:layer="layout" svg:width="4.368cm" svg:height="1.269cm" svg:x="14.884cm" svg:y="12.319cm">
          <text:p text:style-name="P4"><text:span text:style-name="T11">5.2x <text:s/></text:span><text:span text:style-name="T12">Imbal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39" draw:text-style-name="P5" draw:layer="layout" svg:width="4.368cm" svg:height="1.269cm" svg:x="19.253cm" svg:y="12.319cm">
          <text:p text:style-name="P4"><text:span text:style-name="T11">146 removed <text:s/></text:span><text:span text:style-name="T12">Dedup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8" draw:layer="layout" svg:width="2.717cm" svg:height="2.693cm" svg:x="6.985cm" svg:y="3.657cm">
          <draw:image xlink:href="Pictures/10000001000000E2000000E0D160AFA9.png" xlink:type="simple" xlink:show="embed" xlink:actuate="onLoad" draw:mime-type="image/png">
            <text:p/>
          </draw:image>
        </draw:frame>
        <draw:frame draw:style-name="gr40" draw:text-style-name="P18" draw:layer="layout" svg:width="2.849cm" svg:height="2.874cm" svg:x="11.43cm" svg:y="3.476cm">
          <draw:image xlink:href="Pictures/10000001000000DE000000E0EB185E2B.png" xlink:type="simple" xlink:show="embed" xlink:actuate="onLoad" draw:mime-type="image/png">
            <text:p/>
          </draw:image>
        </draw:frame>
        <draw:frame draw:style-name="gr40" draw:text-style-name="P18" draw:layer="layout" svg:width="2.83cm" svg:height="2.882cm" svg:x="15.875cm" svg:y="8.255cm">
          <draw:image xlink:href="Pictures/10000001000000DB000000DFA9C7F90B.png" xlink:type="simple" xlink:show="embed" xlink:actuate="onLoad" draw:mime-type="image/png">
            <text:p/>
          </draw:image>
        </draw:frame>
        <draw:frame draw:style-name="gr40" draw:text-style-name="P18" draw:layer="layout" svg:width="2.587cm" svg:height="2.575cm" svg:x="2.493cm" svg:y="3.775cm">
          <draw:image xlink:href="Pictures/10000001000000DC000000DBEC2F56B9.png" xlink:type="simple" xlink:show="embed" xlink:actuate="onLoad" draw:mime-type="image/png">
            <text:p/>
          </draw:image>
        </draw:frame>
        <draw:frame draw:style-name="gr40" draw:text-style-name="P18" draw:layer="layout" svg:width="2.809cm" svg:height="2.822cm" svg:x="11.43cm" svg:y="8.255cm">
          <draw:image xlink:href="Pictures/10000001000000DB000000DC0FD0F72E.png" xlink:type="simple" xlink:show="embed" xlink:actuate="onLoad" draw:mime-type="image/png">
            <text:p/>
          </draw:image>
        </draw:frame>
        <draw:frame draw:style-name="gr40" draw:text-style-name="P18" draw:layer="layout" svg:width="2.796cm" svg:height="2.822cm" svg:x="15.875cm" svg:y="3.528cm">
          <draw:image xlink:href="Pictures/10000001000000DA000000DCCA24EBB8.png" xlink:type="simple" xlink:show="embed" xlink:actuate="onLoad" draw:mime-type="image/png">
            <text:p/>
          </draw:image>
        </draw:frame>
        <draw:frame draw:style-name="gr40" draw:text-style-name="P18" draw:layer="layout" svg:width="2.849cm" svg:height="2.823cm" svg:x="20.32cm" svg:y="8.255cm">
          <draw:image xlink:href="Pictures/10000001000000DE000000DC33516FB6.png" xlink:type="simple" xlink:show="embed" xlink:actuate="onLoad" draw:mime-type="image/png">
            <text:p/>
          </draw:image>
        </draw:frame>
        <draw:frame draw:style-name="gr40" draw:text-style-name="P18" draw:layer="layout" svg:width="2.633cm" svg:height="2.562cm" svg:x="6.985cm" svg:y="8.255cm">
          <draw:image xlink:href="Pictures/10000001000000E0000000DADC78B8C9.png" xlink:type="simple" xlink:show="embed" xlink:actuate="onLoad" draw:mime-type="image/png">
            <text:p/>
          </draw:image>
        </draw:frame>
        <draw:frame draw:style-name="gr40" draw:text-style-name="P18" draw:layer="layout" svg:width="2.706cm" svg:height="2.756cm" svg:x="2.54cm" svg:y="8.255cm">
          <draw:image xlink:href="Pictures/10000001000000DB000000DF2F6C9189.png" xlink:type="simple" xlink:show="embed" xlink:actuate="onLoad" draw:mime-type="image/png">
            <text:p/>
          </draw:image>
        </draw:frame>
        <draw:frame draw:style-name="gr40" draw:text-style-name="P18" draw:layer="layout" svg:width="2.836cm" svg:height="2.836cm" svg:x="20.32cm" svg:y="3.514cm">
          <draw:image xlink:href="Pictures/10000001000000DD000000DD8DD85A4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9" draw:layer="layout" svg:width="15.239cm" svg:height="8.572cm" svg:x="1.905cm" svg:y="3.175cm" draw:page-number="3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5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41" draw:text-style-name="P11" draw:layer="layout" svg:width="20.319cm" svg:height="1.523cm" svg:x="1.778cm" svg:y="0.889cm">
          <text:p text:style-name="P10"><text:span text:style-name="T6">Transfer Learning Approac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6.349cm" svg:height="5.079cm" svg:x="2.286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2" draw:text-style-name="P13" draw:layer="layout" svg:width="0.151cm" svg:height="5.079cm" svg:x="2.286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523cm" svg:height="1.523cm" svg:x="4.699cm" svg:y="3.937cm">
          <draw:image xlink:href="Pictures/100000010000010000000100E377BA3D.png" xlink:type="simple" xlink:show="embed" xlink:actuate="onLoad" draw:mime-type="image/png">
            <text:p/>
          </draw:image>
          <svg:desc>preencoded.png</svg:desc>
        </draw:frame>
        <draw:custom-shape draw:name="Text 3" draw:style-name="gr42" draw:text-style-name="P5" draw:layer="layout" svg:width="5.333cm" svg:height="1.269cm" svg:x="2.794cm" svg:y="5.588cm">
          <text:p text:style-name="P4"><text:span text:style-name="T13">ImageNe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3" draw:text-style-name="P5" draw:layer="layout" svg:width="5.333cm" svg:height="1.269cm" svg:x="2.794cm" svg:y="6.858cm">
          <text:p text:style-name="P4"><text:span text:style-name="T8">14M images</text:span></text:p>
          <text:p text:style-name="P4"><text:span text:style-name="T8">1000 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1.142cm" svg:height="1.142cm" svg:x="9.017cm" svg:y="5.207cm">
          <draw:image xlink:href="Pictures/1000000100000100000001001D242044.png" xlink:type="simple" xlink:show="embed" xlink:actuate="onLoad" draw:mime-type="image/png">
            <text:p/>
          </draw:image>
          <svg:desc>preencoded.png</svg:desc>
        </draw:frame>
        <draw:custom-shape draw:name="Shape 5" draw:style-name="gr11" draw:text-style-name="P12" draw:layer="layout" svg:width="6.349cm" svg:height="5.079cm" svg:x="10.668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4" draw:text-style-name="P19" draw:layer="layout" svg:width="0.151cm" svg:height="5.079cm" svg:x="10.668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1" draw:layer="layout" svg:width="1.523cm" svg:height="1.523cm" svg:x="13.081cm" svg:y="3.937cm">
          <draw:image xlink:href="Pictures/10000001000001000000010035C63A27.png" xlink:type="simple" xlink:show="embed" xlink:actuate="onLoad" draw:mime-type="image/png">
            <text:p/>
          </draw:image>
          <svg:desc>preencoded.png</svg:desc>
        </draw:frame>
        <draw:custom-shape draw:name="Text 7" draw:style-name="gr45" draw:text-style-name="P5" draw:layer="layout" svg:width="5.333cm" svg:height="1.269cm" svg:x="11.176cm" svg:y="5.588cm">
          <text:p text:style-name="P4"><text:span text:style-name="T13">Pretrained</text:span></text:p>
          <text:p text:style-name="P4"><text:span text:style-name="T13">Backbo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6" draw:text-style-name="P5" draw:layer="layout" svg:width="5.333cm" svg:height="1.269cm" svg:x="11.176cm" svg:y="6.858cm">
          <text:p text:style-name="P4"><text:span text:style-name="T8">Edges, textures</text:span></text:p>
          <text:p text:style-name="P4"><text:span text:style-name="T8">shapes, patter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1" draw:layer="layout" svg:width="1.142cm" svg:height="1.142cm" svg:x="17.399cm" svg:y="5.207cm">
          <draw:image xlink:href="Pictures/1000000100000100000001001D242044.png" xlink:type="simple" xlink:show="embed" xlink:actuate="onLoad" draw:mime-type="image/png">
            <text:p/>
          </draw:image>
          <svg:desc>preencoded.png</svg:desc>
        </draw:frame>
        <draw:custom-shape draw:name="Shape 9" draw:style-name="gr11" draw:text-style-name="P12" draw:layer="layout" svg:width="6.349cm" svg:height="5.079cm" svg:x="19.05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5" draw:text-style-name="P14" draw:layer="layout" svg:width="0.151cm" svg:height="5.079cm" svg:x="19.05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" draw:text-style-name="P1" draw:layer="layout" svg:width="1.523cm" svg:height="1.523cm" svg:x="21.463cm" svg:y="3.937cm">
          <draw:image xlink:href="Pictures/100000010000010000000100E0EB5BCF.png" xlink:type="simple" xlink:show="embed" xlink:actuate="onLoad" draw:mime-type="image/png">
            <text:p/>
          </draw:image>
          <svg:desc>preencoded.png</svg:desc>
        </draw:frame>
        <draw:custom-shape draw:name="Text 11" draw:style-name="gr47" draw:text-style-name="P5" draw:layer="layout" svg:width="5.333cm" svg:height="1.269cm" svg:x="19.558cm" svg:y="5.588cm">
          <text:p text:style-name="P4"><text:span text:style-name="T13">Paddy</text:span></text:p>
          <text:p text:style-name="P4"><text:span text:style-name="T13">Disea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5" draw:layer="layout" svg:width="5.333cm" svg:height="1.269cm" svg:x="19.558cm" svg:y="6.858cm">
          <text:p text:style-name="P4"><text:span text:style-name="T8">Retrain top layers</text:span></text:p>
          <text:p text:style-name="P4"><text:span text:style-name="T8">for 10 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17" draw:layer="layout" svg:width="21.843cm" svg:height="2.158cm" svg:x="1.778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8" draw:text-style-name="P15" draw:layer="layout" svg:width="0.151cm" svg:height="2.158cm" svg:x="1.778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4" draw:text-style-name="P1" draw:layer="layout" svg:width="1.142cm" svg:height="1.142cm" svg:x="2.413cm" svg:y="9.779cm">
          <draw:image xlink:href="Pictures/100000010000010000000100E1C42482.png" xlink:type="simple" xlink:show="embed" xlink:actuate="onLoad" draw:mime-type="image/png">
            <text:p/>
          </draw:image>
          <svg:desc>preencoded.png</svg:desc>
        </draw:frame>
        <draw:custom-shape draw:name="Text 15" draw:style-name="gr49" draw:text-style-name="P11" draw:layer="layout" svg:width="19.049cm" svg:height="2.158cm" svg:x="3.937cm" svg:y="9.398cm">
          <text:p text:style-name="P10"><text:span text:style-name="T14">Analogy: </text:span><text:span text:style-name="T4">Teaching an expert photographer to identify crop diseases — they already understand images, just need domain knowled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4" draw:text-style-name="P1" draw:layer="layout" svg:width="0.761cm" svg:height="0.761cm" svg:x="2.286cm" svg:y="12.192cm">
          <draw:image xlink:href="Pictures/10000001000001000000010093A406A4.png" xlink:type="simple" xlink:show="embed" xlink:actuate="onLoad" draw:mime-type="image/png">
            <text:p/>
          </draw:image>
          <svg:desc>preencoded.png</svg:desc>
        </draw:frame>
        <draw:custom-shape draw:name="Text 16" draw:style-name="gr50" draw:text-style-name="P11" draw:layer="layout" svg:width="6.349cm" svg:height="0.888cm" svg:x="3.302cm" svg:y="12.141cm">
          <text:p text:style-name="P10"><text:span text:style-name="T15">Works with small datase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4" draw:text-style-name="P1" draw:layer="layout" svg:width="0.761cm" svg:height="0.761cm" svg:x="10.16cm" svg:y="12.192cm">
          <draw:image xlink:href="Pictures/10000001000001000000010093A406A4.png" xlink:type="simple" xlink:show="embed" xlink:actuate="onLoad" draw:mime-type="image/png">
            <text:p/>
          </draw:image>
          <svg:desc>preencoded.png</svg:desc>
        </draw:frame>
        <draw:custom-shape draw:name="Text 17" draw:style-name="gr51" draw:text-style-name="P11" draw:layer="layout" svg:width="6.349cm" svg:height="0.888cm" svg:x="11.176cm" svg:y="12.141cm">
          <text:p text:style-name="P10"><text:span text:style-name="T16">Faster converge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4" draw:text-style-name="P1" draw:layer="layout" svg:width="0.761cm" svg:height="0.761cm" svg:x="18.034cm" svg:y="12.192cm">
          <draw:image xlink:href="Pictures/10000001000001000000010093A406A4.png" xlink:type="simple" xlink:show="embed" xlink:actuate="onLoad" draw:mime-type="image/png">
            <text:p/>
          </draw:image>
          <svg:desc>preencoded.png</svg:desc>
        </draw:frame>
        <draw:custom-shape draw:name="Text 18" draw:style-name="gr52" draw:text-style-name="P11" draw:layer="layout" svg:width="6.349cm" svg:height="0.888cm" svg:x="19.05cm" svg:y="12.141cm">
          <text:p text:style-name="P10"><text:span text:style-name="T17">Better generaliz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4" presentation:class="page"/>
          <draw:frame draw:name="Notes Placeholder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6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53" draw:text-style-name="P11" draw:layer="layout" svg:width="20.319cm" svg:height="1.523cm" svg:x="1.778cm" svg:y="0.889cm">
          <text:p text:style-name="P10"><text:span text:style-name="T6">Architecture: EfficientNetB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54" draw:text-style-name="P20" draw:layer="layout" svg:width="2.793cm" svg:height="2.793cm" svg:x="1.143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5" draw:text-style-name="P5" draw:layer="layout" svg:width="2.793cm" svg:height="2.793cm" svg:x="1.143cm" svg:y="3.302cm">
          <text:p text:style-name="P4"><text:span text:style-name="T10">Input</text:span></text:p>
          <text:p text:style-name="P4"><text:span text:style-name="T10">300×300×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6" draw:text-style-name="P5" draw:layer="layout" svg:width="0.507cm" svg:height="2.793cm" svg:x="3.937cm" svg:y="3.302cm">
          <text:p text:style-name="P4"><text:span text:style-name="T18">&gt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7" draw:text-style-name="P21" draw:layer="layout" svg:width="2.158cm" svg:height="2.793cm" svg:x="4.445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8" draw:text-style-name="P5" draw:layer="layout" svg:width="2.158cm" svg:height="2.793cm" svg:x="4.445cm" svg:y="3.302cm">
          <text:p text:style-name="P4"><text:span text:style-name="T10">Stem</text:span></text:p>
          <text:p text:style-name="P4"><text:span text:style-name="T10">7 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9" draw:text-style-name="P5" draw:layer="layout" svg:width="0.507cm" svg:height="2.793cm" svg:x="6.604cm" svg:y="3.302cm">
          <text:p text:style-name="P4"><text:span text:style-name="T18">&gt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0" draw:text-style-name="P22" draw:layer="layout" svg:width="2.666cm" svg:height="2.793cm" svg:x="7.112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1" draw:text-style-name="P5" draw:layer="layout" svg:width="2.666cm" svg:height="2.793cm" svg:x="7.112cm" svg:y="3.302cm">
          <text:p text:style-name="P4"><text:span text:style-name="T10">Block 1-2</text:span></text:p>
          <text:p text:style-name="P4"><text:span text:style-name="T10">66 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2" draw:text-style-name="P5" draw:layer="layout" svg:width="0.507cm" svg:height="2.793cm" svg:x="9.779cm" svg:y="3.302cm">
          <text:p text:style-name="P4"><text:span text:style-name="T18">&gt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3" draw:text-style-name="P23" draw:layer="layout" svg:width="2.92cm" svg:height="2.793cm" svg:x="10.287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4" draw:text-style-name="P5" draw:layer="layout" svg:width="2.92cm" svg:height="2.793cm" svg:x="10.287cm" svg:y="3.302cm">
          <text:p text:style-name="P4"><text:span text:style-name="T10">Block 3-4</text:span></text:p>
          <text:p text:style-name="P4"><text:span text:style-name="T10">118 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5" draw:text-style-name="P5" draw:layer="layout" svg:width="0.507cm" svg:height="2.793cm" svg:x="13.208cm" svg:y="3.302cm">
          <text:p text:style-name="P4"><text:span text:style-name="T18">&gt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66" draw:text-style-name="P19" draw:layer="layout" svg:width="3.174cm" svg:height="2.793cm" svg:x="13.716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67" draw:text-style-name="P5" draw:layer="layout" svg:width="3.174cm" svg:height="2.793cm" svg:x="13.716cm" svg:y="3.302cm">
          <text:p text:style-name="P4"><text:span text:style-name="T10">Block 5-7</text:span></text:p>
          <text:p text:style-name="P4"><text:span text:style-name="T10">190 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8" draw:text-style-name="P5" draw:layer="layout" svg:width="0.507cm" svg:height="2.793cm" svg:x="16.891cm" svg:y="3.302cm">
          <text:p text:style-name="P4"><text:span text:style-name="T18">&gt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69" draw:text-style-name="P24" draw:layer="layout" svg:width="2.158cm" svg:height="2.793cm" svg:x="17.399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0" draw:text-style-name="P5" draw:layer="layout" svg:width="2.158cm" svg:height="2.793cm" svg:x="17.399cm" svg:y="3.302cm">
          <text:p text:style-name="P4"><text:span text:style-name="T10">Top</text:span></text:p>
          <text:p text:style-name="P4"><text:span text:style-name="T10">3 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1" draw:text-style-name="P5" draw:layer="layout" svg:width="0.507cm" svg:height="2.793cm" svg:x="19.558cm" svg:y="3.302cm">
          <text:p text:style-name="P4"><text:span text:style-name="T18">&gt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72" draw:text-style-name="P25" draw:layer="layout" svg:width="2.158cm" svg:height="2.793cm" svg:x="20.066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3" draw:text-style-name="P5" draw:layer="layout" svg:width="2.158cm" svg:height="2.793cm" svg:x="20.066cm" svg:y="3.302cm">
          <text:p text:style-name="P4"><text:span text:style-name="T10">GAP</text:span></text:p>
          <text:p text:style-name="P4"><text:span text:style-name="T10">Drop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4" draw:text-style-name="P5" draw:layer="layout" svg:width="0.507cm" svg:height="2.793cm" svg:x="22.225cm" svg:y="3.302cm">
          <text:p text:style-name="P4"><text:span text:style-name="T18">&gt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75" draw:text-style-name="P26" draw:layer="layout" svg:width="2.539cm" svg:height="2.793cm" svg:x="22.733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6" draw:text-style-name="P5" draw:layer="layout" svg:width="2.539cm" svg:height="2.793cm" svg:x="22.733cm" svg:y="3.302cm">
          <text:p text:style-name="P4"><text:span text:style-name="T10">Dense(10)</text:span></text:p>
          <text:p text:style-name="P4"><text:span text:style-name="T10">Softma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77" draw:text-style-name="P12" draw:layer="layout" svg:width="5.079cm" svg:height="2.412cm" svg:x="1.778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8" draw:text-style-name="P5" draw:layer="layout" svg:width="5.079cm" svg:height="1.269cm" svg:x="1.778cm" svg:y="7.112cm">
          <text:p text:style-name="P4"><text:span text:style-name="T19">38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79" draw:text-style-name="P5" draw:layer="layout" svg:width="5.079cm" svg:height="0.888cm" svg:x="1.778cm" svg:y="8.255cm">
          <text:p text:style-name="P4"><text:span text:style-name="T12">Total 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77" draw:text-style-name="P12" draw:layer="layout" svg:width="5.079cm" svg:height="2.412cm" svg:x="7.366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80" draw:text-style-name="P5" draw:layer="layout" svg:width="5.079cm" svg:height="1.269cm" svg:x="7.366cm" svg:y="7.112cm">
          <text:p text:style-name="P4"><text:span text:style-name="T19">10.78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81" draw:text-style-name="P5" draw:layer="layout" svg:width="5.079cm" svg:height="0.888cm" svg:x="7.366cm" svg:y="8.255cm">
          <text:p text:style-name="P4"><text:span text:style-name="T12">Paramet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77" draw:text-style-name="P12" draw:layer="layout" svg:width="5.079cm" svg:height="2.412cm" svg:x="12.954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82" draw:text-style-name="P5" draw:layer="layout" svg:width="5.079cm" svg:height="1.269cm" svg:x="12.954cm" svg:y="7.112cm">
          <text:p text:style-name="P4"><text:span text:style-name="T19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83" draw:text-style-name="P5" draw:layer="layout" svg:width="5.079cm" svg:height="0.888cm" svg:x="12.954cm" svg:y="8.255cm">
          <text:p text:style-name="P4"><text:span text:style-name="T12">MBConv Bloc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77" draw:text-style-name="P12" draw:layer="layout" svg:width="5.079cm" svg:height="2.412cm" svg:x="18.542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84" draw:text-style-name="P5" draw:layer="layout" svg:width="5.079cm" svg:height="1.269cm" svg:x="18.542cm" svg:y="7.112cm">
          <text:p text:style-name="P4"><text:span text:style-name="T19">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85" draw:text-style-name="P5" draw:layer="layout" svg:width="5.079cm" svg:height="0.888cm" svg:x="18.542cm" svg:y="8.255cm">
          <text:p text:style-name="P4"><text:span text:style-name="T12">Sub-bloc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86" draw:text-style-name="P11" draw:layer="layout" svg:width="20.319cm" svg:height="1.015cm" svg:x="1.778cm" svg:y="10.16cm">
          <text:p text:style-name="P10"><text:span text:style-name="T7">Why EfficientNetB3 over ResNet50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0.634cm" svg:height="0.634cm" svg:x="2.032cm" svg:y="11.43cm">
          <draw:image xlink:href="Pictures/100000010000010000000100B03B6B68.png" xlink:type="simple" xlink:show="embed" xlink:actuate="onLoad" draw:mime-type="image/png">
            <text:p/>
          </draw:image>
          <svg:desc>preencoded.png</svg:desc>
        </draw:frame>
        <draw:custom-shape draw:name="Text 37" draw:style-name="gr87" draw:text-style-name="P11" draw:layer="layout" svg:width="17.779cm" svg:height="0.761cm" svg:x="2.921cm" svg:y="11.43cm">
          <text:p text:style-name="P10"><text:span text:style-name="T8">Compound scaling balances depth, width, resolu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0.634cm" svg:height="0.634cm" svg:x="2.032cm" svg:y="12.319cm">
          <draw:image xlink:href="Pictures/1000000100000100000001005ACCC37B.png" xlink:type="simple" xlink:show="embed" xlink:actuate="onLoad" draw:mime-type="image/png">
            <text:p/>
          </draw:image>
          <svg:desc>preencoded.png</svg:desc>
        </draw:frame>
        <draw:custom-shape draw:name="Text 38" draw:style-name="gr88" draw:text-style-name="P11" draw:layer="layout" svg:width="17.779cm" svg:height="0.761cm" svg:x="2.921cm" svg:y="12.319cm">
          <text:p text:style-name="P10"><text:span text:style-name="T8">Better accuracy-to-compute ratio for fine-grained tas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1" draw:layer="layout" svg:width="0.634cm" svg:height="0.634cm" svg:x="2.032cm" svg:y="13.208cm">
          <draw:image xlink:href="Pictures/1000000100000100000001007A1D978B.png" xlink:type="simple" xlink:show="embed" xlink:actuate="onLoad" draw:mime-type="image/png">
            <text:p/>
          </draw:image>
          <svg:desc>preencoded.png</svg:desc>
        </draw:frame>
        <draw:custom-shape draw:name="Text 39" draw:style-name="gr89" draw:text-style-name="P11" draw:layer="layout" svg:width="17.779cm" svg:height="0.761cm" svg:x="2.921cm" svg:y="13.208cm">
          <text:p text:style-name="P10"><text:span text:style-name="T8">Fits in 4GB VRAM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5" presentation:class="page"/>
          <draw:frame draw:name="Notes Placeholder 2" presentation:style-name="pr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7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90" draw:text-style-name="P11" draw:layer="layout" svg:width="20.319cm" svg:height="1.523cm" svg:x="1.778cm" svg:y="0.889cm">
          <text:p text:style-name="P10"><text:span text:style-name="T6">Architecture Evolu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7.365cm" svg:height="8.635cm" svg:x="1.397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91" draw:text-style-name="P27" draw:layer="layout" svg:width="7.365cm" svg:height="0.151cm" svg:x="1.397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2" draw:text-style-name="P11" draw:layer="layout" svg:width="6.603cm" svg:height="1.015cm" svg:x="1.778cm" svg:y="3.81cm">
          <text:p text:style-name="P10"><text:span text:style-name="T20">ResNet5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3" draw:text-style-name="P11" draw:layer="layout" svg:width="6.603cm" svg:height="0.761cm" svg:x="1.778cm" svg:y="4.826cm">
          <text:p text:style-name="P10"><text:span text:style-name="T4">224×22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4" draw:text-style-name="P11" draw:layer="layout" svg:width="6.603cm" svg:height="1.523cm" svg:x="1.778cm" svg:y="5.715cm">
          <text:p text:style-name="P10"><text:span text:style-name="T21">~84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95" draw:text-style-name="P28" draw:layer="layout" svg:width="4.063cm" svg:height="0.761cm" svg:x="1.778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6" draw:text-style-name="P5" draw:layer="layout" svg:width="4.063cm" svg:height="0.761cm" svg:x="1.778cm" svg:y="7.366cm">
          <text:p text:style-name="P4"><text:span text:style-name="T22">Over-regulariz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7" draw:text-style-name="P11" draw:layer="layout" svg:width="6.603cm" svg:height="2.793cm" svg:x="1.778cm" svg:y="8.509cm">
          <text:p text:style-name="P10"><text:span text:style-name="T12">L2 + BN + Dropout×3</text:span></text:p>
          <text:p text:style-name="P10"><text:span text:style-name="T12">Only conv5_x unfrozen</text:span></text:p>
          <text:p text:style-name="P10"><text:span text:style-name="T12">LR too conservat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0.761cm" svg:height="0.761cm" svg:x="8.89cm" svg:y="6.604cm">
          <draw:image xlink:href="Pictures/100000010000010000000100533A04F7.png" xlink:type="simple" xlink:show="embed" xlink:actuate="onLoad" draw:mime-type="image/png">
            <text:p/>
          </draw:image>
          <svg:desc>preencoded.png</svg:desc>
        </draw:frame>
        <draw:custom-shape draw:name="Shape 9" draw:style-name="gr11" draw:text-style-name="P12" draw:layer="layout" svg:width="7.365cm" svg:height="8.635cm" svg:x="9.398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8" draw:text-style-name="P15" draw:layer="layout" svg:width="7.365cm" svg:height="0.151cm" svg:x="9.398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8" draw:text-style-name="P11" draw:layer="layout" svg:width="6.603cm" svg:height="1.015cm" svg:x="9.779cm" svg:y="3.81cm">
          <text:p text:style-name="P10"><text:span text:style-name="T20">EfficientNetB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9" draw:text-style-name="P11" draw:layer="layout" svg:width="6.603cm" svg:height="0.761cm" svg:x="9.779cm" svg:y="4.826cm">
          <text:p text:style-name="P10"><text:span text:style-name="T4">224×22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0" draw:text-style-name="P11" draw:layer="layout" svg:width="6.603cm" svg:height="1.523cm" svg:x="9.779cm" svg:y="5.715cm">
          <text:p text:style-name="P10"><text:span text:style-name="T23">~91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1" draw:text-style-name="P29" draw:layer="layout" svg:width="4.063cm" svg:height="0.761cm" svg:x="9.779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2" draw:text-style-name="P5" draw:layer="layout" svg:width="4.063cm" svg:height="0.761cm" svg:x="9.779cm" svg:y="7.366cm">
          <text:p text:style-name="P4"><text:span text:style-name="T24">Memory saf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03" draw:text-style-name="P11" draw:layer="layout" svg:width="6.603cm" svg:height="2.793cm" svg:x="9.779cm" svg:y="8.509cm">
          <text:p text:style-name="P10"><text:span text:style-name="T12">Lighter model</text:span></text:p>
          <text:p text:style-name="P10"><text:span text:style-name="T12">Good baseline</text:span></text:p>
          <text:p text:style-name="P10"><text:span text:style-name="T12">Limited capac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0.761cm" svg:height="0.761cm" svg:x="16.891cm" svg:y="6.604cm">
          <draw:image xlink:href="Pictures/100000010000010000000100533A04F7.png" xlink:type="simple" xlink:show="embed" xlink:actuate="onLoad" draw:mime-type="image/png">
            <text:p/>
          </draw:image>
          <svg:desc>preencoded.png</svg:desc>
        </draw:frame>
        <draw:custom-shape draw:name="Shape 17" draw:style-name="gr11" draw:text-style-name="P12" draw:layer="layout" svg:width="7.365cm" svg:height="8.635cm" svg:x="17.399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5" draw:text-style-name="P14" draw:layer="layout" svg:width="7.365cm" svg:height="0.151cm" svg:x="17.399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04" draw:text-style-name="P11" draw:layer="layout" svg:width="6.603cm" svg:height="1.015cm" svg:x="17.78cm" svg:y="3.81cm">
          <text:p text:style-name="P10"><text:span text:style-name="T20">EfficientNetB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05" draw:text-style-name="P11" draw:layer="layout" svg:width="6.603cm" svg:height="0.761cm" svg:x="17.78cm" svg:y="4.826cm">
          <text:p text:style-name="P10"><text:span text:style-name="T4">300×3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06" draw:text-style-name="P11" draw:layer="layout" svg:width="6.603cm" svg:height="1.523cm" svg:x="17.78cm" svg:y="5.715cm">
          <text:p text:style-name="P10"><text:span text:style-name="T25">~9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07" draw:text-style-name="P30" draw:layer="layout" svg:width="4.063cm" svg:height="0.761cm" svg:x="17.78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08" draw:text-style-name="P5" draw:layer="layout" svg:width="4.063cm" svg:height="0.761cm" svg:x="17.78cm" svg:y="7.366cm">
          <text:p text:style-name="P4"><text:span text:style-name="T26">Final choi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09" draw:text-style-name="P11" draw:layer="layout" svg:width="6.603cm" svg:height="2.793cm" svg:x="17.78cm" svg:y="8.509cm">
          <text:p text:style-name="P10"><text:span text:style-name="T12">Compound scaling</text:span></text:p>
          <text:p text:style-name="P10"><text:span text:style-name="T12">Native 300px</text:span></text:p>
          <text:p text:style-name="P10"><text:span text:style-name="T12">Minimal head: GAP→D(0.3)→Dense(10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1" draw:text-style-name="P17" draw:layer="layout" svg:width="21.843cm" svg:height="1.142cm" svg:x="1.778cm" svg:y="12.57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10" draw:text-style-name="P11" draw:layer="layout" svg:width="20.827cm" svg:height="1.142cm" svg:x="2.286cm" svg:y="12.573cm">
          <text:p text:style-name="P10"><text:span text:style-name="T11">Key insight: </text:span><text:span text:style-name="T4">Minimal head (GAP → Dropout → Dense) outperforms over-engineered classifier stac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6" presentation:class="page"/>
          <draw:frame draw:name="Notes Placeholder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8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111" draw:text-style-name="P11" draw:layer="layout" svg:width="20.319cm" svg:height="1.396cm" svg:x="1.778cm" svg:y="0.635cm">
          <text:p text:style-name="P10"><text:span text:style-name="T27">3-Phase Progressive Unfreez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032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7.492cm" svg:height="10.413cm" svg:x="1.143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2" draw:text-style-name="P13" draw:layer="layout" svg:width="7.492cm" svg:height="0.151cm" svg:x="1.143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2" draw:text-style-name="P11" draw:layer="layout" svg:width="6.603cm" svg:height="0.888cm" svg:x="1.524cm" svg:y="3.175cm">
          <text:p text:style-name="P10"><text:span text:style-name="T28">Phase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3" draw:text-style-name="P11" draw:layer="layout" svg:width="6.603cm" svg:height="0.634cm" svg:x="1.524cm" svg:y="3.937cm">
          <text:p text:style-name="P10"><text:span text:style-name="T4">Head On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4" draw:text-style-name="P11" draw:layer="layout" svg:width="6.603cm" svg:height="1.396cm" svg:x="1.524cm" svg:y="4.699cm">
          <text:p text:style-name="P10"><text:span text:style-name="T29">~8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5" draw:text-style-name="P11" draw:layer="layout" svg:width="2.793cm" svg:height="0.634cm" svg:x="1.524cm" svg:y="6.477cm">
          <text:p text:style-name="P10"><text:span text:style-name="T30">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6" draw:text-style-name="P11" draw:layer="layout" svg:width="3.555cm" svg:height="0.634cm" svg:x="4.445cm" svg:y="6.477cm">
          <text:p text:style-name="P10"><text:span text:style-name="T31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7" draw:text-style-name="P11" draw:layer="layout" svg:width="2.793cm" svg:height="0.634cm" svg:x="1.524cm" svg:y="7.239cm">
          <text:p text:style-name="P10"><text:span text:style-name="T30">Param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8" draw:text-style-name="P11" draw:layer="layout" svg:width="3.555cm" svg:height="0.634cm" svg:x="4.445cm" svg:y="7.239cm">
          <text:p text:style-name="P10"><text:span text:style-name="T31">15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9" draw:text-style-name="P11" draw:layer="layout" svg:width="2.793cm" svg:height="0.634cm" svg:x="1.524cm" svg:y="8.001cm">
          <text:p text:style-name="P10"><text:span text:style-name="T30">% 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20" draw:text-style-name="P11" draw:layer="layout" svg:width="3.555cm" svg:height="0.634cm" svg:x="4.445cm" svg:y="8.001cm">
          <text:p text:style-name="P10"><text:span text:style-name="T31">0.14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1" draw:text-style-name="P11" draw:layer="layout" svg:width="2.793cm" svg:height="0.634cm" svg:x="1.524cm" svg:y="8.763cm">
          <text:p text:style-name="P10"><text:span text:style-name="T30">L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2" draw:text-style-name="P11" draw:layer="layout" svg:width="3.555cm" svg:height="0.634cm" svg:x="4.445cm" svg:y="8.763cm">
          <text:p text:style-name="P10"><text:span text:style-name="T31">1e-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23" draw:text-style-name="P11" draw:layer="layout" svg:width="2.793cm" svg:height="0.634cm" svg:x="1.524cm" svg:y="9.525cm">
          <text:p text:style-name="P10"><text:span text:style-name="T30">Epoch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24" draw:text-style-name="P11" draw:layer="layout" svg:width="3.555cm" svg:height="0.634cm" svg:x="4.445cm" svg:y="9.525cm">
          <text:p text:style-name="P10"><text:span text:style-name="T31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5" draw:text-style-name="P31" draw:layer="layout" svg:width="6.603cm" svg:height="1.396cm" svg:x="1.524cm" svg:y="10.5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6" draw:text-style-name="P11" draw:layer="layout" svg:width="6.095cm" svg:height="1.269cm" svg:x="1.778cm" svg:y="10.617cm">
          <text:p text:style-name="P10"><text:span text:style-name="T32">EarlyStopping</text:span></text:p>
          <text:p text:style-name="P10"><text:span text:style-name="T32">ReduceLROnPlatea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7" draw:text-style-name="P11" draw:layer="layout" svg:width="6.603cm" svg:height="0.634cm" svg:x="1.524cm" svg:y="12.192cm">
          <text:p text:style-name="P10"><text:span text:style-name="T33">All froze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1" draw:text-style-name="P12" draw:layer="layout" svg:width="7.492cm" svg:height="10.413cm" svg:x="9.144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4" draw:text-style-name="P19" draw:layer="layout" svg:width="7.492cm" svg:height="0.151cm" svg:x="9.144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28" draw:text-style-name="P11" draw:layer="layout" svg:width="6.603cm" svg:height="0.888cm" svg:x="9.525cm" svg:y="3.175cm">
          <text:p text:style-name="P10"><text:span text:style-name="T34">Phase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9" draw:text-style-name="P11" draw:layer="layout" svg:width="6.603cm" svg:height="0.634cm" svg:x="9.525cm" svg:y="3.937cm">
          <text:p text:style-name="P10"><text:span text:style-name="T4">Blocks 5-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0" draw:text-style-name="P11" draw:layer="layout" svg:width="6.603cm" svg:height="1.396cm" svg:x="9.525cm" svg:y="4.699cm">
          <text:p text:style-name="P10"><text:span text:style-name="T35">~96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31" draw:text-style-name="P11" draw:layer="layout" svg:width="2.793cm" svg:height="0.634cm" svg:x="9.525cm" svg:y="6.477cm">
          <text:p text:style-name="P10"><text:span text:style-name="T30">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32" draw:text-style-name="P11" draw:layer="layout" svg:width="3.555cm" svg:height="0.634cm" svg:x="12.446cm" svg:y="6.477cm">
          <text:p text:style-name="P10"><text:span text:style-name="T31">19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33" draw:text-style-name="P11" draw:layer="layout" svg:width="2.793cm" svg:height="0.634cm" svg:x="9.525cm" svg:y="7.239cm">
          <text:p text:style-name="P10"><text:span text:style-name="T30">Param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34" draw:text-style-name="P11" draw:layer="layout" svg:width="3.555cm" svg:height="0.634cm" svg:x="12.446cm" svg:y="7.239cm">
          <text:p text:style-name="P10"><text:span text:style-name="T31">9.98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35" draw:text-style-name="P11" draw:layer="layout" svg:width="2.793cm" svg:height="0.634cm" svg:x="9.525cm" svg:y="8.001cm">
          <text:p text:style-name="P10"><text:span text:style-name="T30">% 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36" draw:text-style-name="P11" draw:layer="layout" svg:width="3.555cm" svg:height="0.634cm" svg:x="12.446cm" svg:y="8.001cm">
          <text:p text:style-name="P10"><text:span text:style-name="T31">92.5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37" draw:text-style-name="P11" draw:layer="layout" svg:width="2.793cm" svg:height="0.634cm" svg:x="9.525cm" svg:y="8.763cm">
          <text:p text:style-name="P10"><text:span text:style-name="T30">L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38" draw:text-style-name="P11" draw:layer="layout" svg:width="3.555cm" svg:height="0.634cm" svg:x="12.446cm" svg:y="8.763cm">
          <text:p text:style-name="P10"><text:span text:style-name="T31">1e-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39" draw:text-style-name="P11" draw:layer="layout" svg:width="2.793cm" svg:height="0.634cm" svg:x="9.525cm" svg:y="9.525cm">
          <text:p text:style-name="P10"><text:span text:style-name="T30">Epoch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40" draw:text-style-name="P11" draw:layer="layout" svg:width="3.555cm" svg:height="0.634cm" svg:x="12.446cm" svg:y="9.525cm">
          <text:p text:style-name="P10"><text:span text:style-name="T31">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25" draw:text-style-name="P31" draw:layer="layout" svg:width="6.603cm" svg:height="1.396cm" svg:x="9.525cm" svg:y="10.5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41" draw:text-style-name="P11" draw:layer="layout" svg:width="6.095cm" svg:height="1.269cm" svg:x="9.779cm" svg:y="10.617cm">
          <text:p text:style-name="P10"><text:span text:style-name="T36">Warmup (2 ep)</text:span></text:p>
          <text:p text:style-name="P10"><text:span text:style-name="T36">Cosine Deca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42" draw:text-style-name="P11" draw:layer="layout" svg:width="6.603cm" svg:height="0.634cm" svg:x="9.525cm" svg:y="12.192cm">
          <text:p text:style-name="P10"><text:span text:style-name="T33">Blocks 5-7 unfroze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1" draw:text-style-name="P12" draw:layer="layout" svg:width="7.492cm" svg:height="10.413cm" svg:x="17.145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5" draw:text-style-name="P14" draw:layer="layout" svg:width="7.492cm" svg:height="0.151cm" svg:x="17.145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43" draw:text-style-name="P11" draw:layer="layout" svg:width="6.603cm" svg:height="0.888cm" svg:x="17.526cm" svg:y="3.175cm">
          <text:p text:style-name="P10"><text:span text:style-name="T37">Phase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44" draw:text-style-name="P11" draw:layer="layout" svg:width="6.603cm" svg:height="0.634cm" svg:x="17.526cm" svg:y="3.937cm">
          <text:p text:style-name="P10"><text:span text:style-name="T4">Blocks 3-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45" draw:text-style-name="P11" draw:layer="layout" svg:width="6.603cm" svg:height="1.396cm" svg:x="17.526cm" svg:y="4.699cm">
          <text:p text:style-name="P10"><text:span text:style-name="T38">~9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46" draw:text-style-name="P11" draw:layer="layout" svg:width="2.793cm" svg:height="0.634cm" svg:x="17.526cm" svg:y="6.477cm">
          <text:p text:style-name="P10"><text:span text:style-name="T30">Lay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47" draw:text-style-name="P11" draw:layer="layout" svg:width="3.555cm" svg:height="0.634cm" svg:x="20.447cm" svg:y="6.477cm">
          <text:p text:style-name="P10"><text:span text:style-name="T31">3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48" draw:text-style-name="P11" draw:layer="layout" svg:width="2.793cm" svg:height="0.634cm" svg:x="17.526cm" svg:y="7.239cm">
          <text:p text:style-name="P10"><text:span text:style-name="T30">Param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49" draw:text-style-name="P11" draw:layer="layout" svg:width="3.555cm" svg:height="0.634cm" svg:x="20.447cm" svg:y="7.239cm">
          <text:p text:style-name="P10"><text:span text:style-name="T31">10.73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50" draw:text-style-name="P11" draw:layer="layout" svg:width="2.793cm" svg:height="0.634cm" svg:x="17.526cm" svg:y="8.001cm">
          <text:p text:style-name="P10"><text:span text:style-name="T30">% 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51" draw:text-style-name="P11" draw:layer="layout" svg:width="3.555cm" svg:height="0.634cm" svg:x="20.447cm" svg:y="8.001cm">
          <text:p text:style-name="P10"><text:span text:style-name="T31">99.5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52" draw:text-style-name="P11" draw:layer="layout" svg:width="2.793cm" svg:height="0.634cm" svg:x="17.526cm" svg:y="8.763cm">
          <text:p text:style-name="P10"><text:span text:style-name="T30">L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53" draw:text-style-name="P11" draw:layer="layout" svg:width="3.555cm" svg:height="0.634cm" svg:x="20.447cm" svg:y="8.763cm">
          <text:p text:style-name="P10"><text:span text:style-name="T31">2e-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54" draw:text-style-name="P11" draw:layer="layout" svg:width="2.793cm" svg:height="0.634cm" svg:x="17.526cm" svg:y="9.525cm">
          <text:p text:style-name="P10"><text:span text:style-name="T30">Epoch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155" draw:text-style-name="P11" draw:layer="layout" svg:width="3.555cm" svg:height="0.634cm" svg:x="20.447cm" svg:y="9.525cm">
          <text:p text:style-name="P10"><text:span text:style-name="T31">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25" draw:text-style-name="P31" draw:layer="layout" svg:width="6.603cm" svg:height="1.396cm" svg:x="17.526cm" svg:y="10.5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56" draw:text-style-name="P11" draw:layer="layout" svg:width="6.095cm" svg:height="1.269cm" svg:x="17.78cm" svg:y="10.617cm">
          <text:p text:style-name="P10"><text:span text:style-name="T39">Warmup (2 ep)</text:span></text:p>
          <text:p text:style-name="P10"><text:span text:style-name="T39">Cosine Deca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157" draw:text-style-name="P11" draw:layer="layout" svg:width="6.603cm" svg:height="0.634cm" svg:x="17.526cm" svg:y="12.192cm">
          <text:p text:style-name="P10"><text:span text:style-name="T33">Blocks 3-7 unfroze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7" presentation:class="page"/>
          <draw:frame draw:name="Notes Placeholder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9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158" draw:text-style-name="P11" draw:layer="layout" svg:width="22.859cm" svg:height="1.523cm" svg:x="1.778cm" svg:y="0.889cm">
          <text:p text:style-name="P10"><text:span text:style-name="T27">Key Techniques That Pushed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7.365cm" svg:height="4.698cm" svg:x="1.397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5" draw:text-style-name="P14" draw:layer="layout" svg:width="0.151cm" svg:height="4.698cm" svg:x="1.397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269cm" svg:height="1.269cm" svg:x="2.032cm" svg:y="3.556cm">
          <draw:image xlink:href="Pictures/100000010000010000000100AB9FDB8E.png" xlink:type="simple" xlink:show="embed" xlink:actuate="onLoad" draw:mime-type="image/png">
            <text:p/>
          </draw:image>
          <svg:desc>preencoded.png</svg:desc>
        </draw:frame>
        <draw:custom-shape draw:name="Text 3" draw:style-name="gr159" draw:text-style-name="P11" draw:layer="layout" svg:width="6.095cm" svg:height="0.888cm" svg:x="2.032cm" svg:y="5.029cm">
          <text:p text:style-name="P10"><text:span text:style-name="T40">Label Smoothing (0.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0" draw:text-style-name="P11" draw:layer="layout" svg:width="6.095cm" svg:height="1.396cm" svg:x="2.032cm" svg:y="5.969cm">
          <text:p text:style-name="P10"><text:span text:style-name="T12">Prevents overconfident predictions</text:span></text:p>
          <text:p text:style-name="P10"><text:span text:style-name="T12">+1-2% generalization boo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1" draw:text-style-name="P12" draw:layer="layout" svg:width="7.365cm" svg:height="4.698cm" svg:x="9.271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2" draw:text-style-name="P13" draw:layer="layout" svg:width="0.151cm" svg:height="4.698cm" svg:x="9.271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1.269cm" svg:height="1.269cm" svg:x="9.906cm" svg:y="3.556cm">
          <draw:image xlink:href="Pictures/1000000100000100000001008662D2C1.png" xlink:type="simple" xlink:show="embed" xlink:actuate="onLoad" draw:mime-type="image/png">
            <text:p/>
          </draw:image>
          <svg:desc>preencoded.png</svg:desc>
        </draw:frame>
        <draw:custom-shape draw:name="Text 7" draw:style-name="gr161" draw:text-style-name="P11" draw:layer="layout" svg:width="6.095cm" svg:height="0.888cm" svg:x="9.906cm" svg:y="5.029cm">
          <text:p text:style-name="P10"><text:span text:style-name="T40">Warmup + Cosine L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2" draw:text-style-name="P11" draw:layer="layout" svg:width="6.095cm" svg:height="1.396cm" svg:x="9.906cm" svg:y="5.969cm">
          <text:p text:style-name="P10"><text:span text:style-name="T12">Protects newly unfrozen layers</text:span></text:p>
          <text:p text:style-name="P10"><text:span text:style-name="T12">from gradient sh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1" draw:text-style-name="P12" draw:layer="layout" svg:width="7.365cm" svg:height="4.698cm" svg:x="17.145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4" draw:text-style-name="P19" draw:layer="layout" svg:width="0.151cm" svg:height="4.698cm" svg:x="17.145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1" draw:layer="layout" svg:width="1.269cm" svg:height="1.269cm" svg:x="17.78cm" svg:y="3.556cm">
          <draw:image xlink:href="Pictures/100000010000010000000100B9A4B818.png" xlink:type="simple" xlink:show="embed" xlink:actuate="onLoad" draw:mime-type="image/png">
            <text:p/>
          </draw:image>
          <svg:desc>preencoded.png</svg:desc>
        </draw:frame>
        <draw:custom-shape draw:name="Text 11" draw:style-name="gr163" draw:text-style-name="P11" draw:layer="layout" svg:width="6.095cm" svg:height="0.888cm" svg:x="17.78cm" svg:y="5.029cm">
          <text:p text:style-name="P10"><text:span text:style-name="T40">Test-Time Augmen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4" draw:text-style-name="P11" draw:layer="layout" svg:width="6.095cm" svg:height="1.396cm" svg:x="17.78cm" svg:y="5.969cm">
          <text:p text:style-name="P10"><text:span text:style-name="T12">5 passes averaged at inference</text:span></text:p>
          <text:p text:style-name="P10"><text:span text:style-name="T12">Free +1-2%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" draw:text-style-name="P12" draw:layer="layout" svg:width="7.365cm" svg:height="4.698cm" svg:x="1.397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65" draw:text-style-name="P32" draw:layer="layout" svg:width="0.151cm" svg:height="4.698cm" svg:x="1.397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1" draw:layer="layout" svg:width="1.269cm" svg:height="1.269cm" svg:x="2.032cm" svg:y="8.89cm">
          <draw:image xlink:href="Pictures/100000010000010000000100541F4388.png" xlink:type="simple" xlink:show="embed" xlink:actuate="onLoad" draw:mime-type="image/png">
            <text:p/>
          </draw:image>
          <svg:desc>preencoded.png</svg:desc>
        </draw:frame>
        <draw:custom-shape draw:name="Text 15" draw:style-name="gr166" draw:text-style-name="P11" draw:layer="layout" svg:width="6.095cm" svg:height="0.888cm" svg:x="2.032cm" svg:y="10.363cm">
          <text:p text:style-name="P10"><text:span text:style-name="T40">Block-Based Freez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67" draw:text-style-name="P11" draw:layer="layout" svg:width="6.095cm" svg:height="1.396cm" svg:x="2.032cm" svg:y="11.303cm">
          <text:p text:style-name="P10"><text:span text:style-name="T12">Freeze at block boundaries</text:span></text:p>
          <text:p text:style-name="P10"><text:span text:style-name="T12">not arbitrary layer coun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1" draw:text-style-name="P12" draw:layer="layout" svg:width="7.365cm" svg:height="4.698cm" svg:x="9.271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8" draw:text-style-name="P15" draw:layer="layout" svg:width="0.151cm" svg:height="4.698cm" svg:x="9.271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" draw:text-style-name="P1" draw:layer="layout" svg:width="1.269cm" svg:height="1.269cm" svg:x="9.906cm" svg:y="8.89cm">
          <draw:image xlink:href="Pictures/1000000100000100000001007A1D978B.png" xlink:type="simple" xlink:show="embed" xlink:actuate="onLoad" draw:mime-type="image/png">
            <text:p/>
          </draw:image>
          <svg:desc>preencoded.png</svg:desc>
        </draw:frame>
        <draw:custom-shape draw:name="Text 19" draw:style-name="gr168" draw:text-style-name="P11" draw:layer="layout" svg:width="6.095cm" svg:height="0.888cm" svg:x="9.906cm" svg:y="10.363cm">
          <text:p text:style-name="P10"><text:span text:style-name="T40">Mixed Precision (FP16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69" draw:text-style-name="P11" draw:layer="layout" svg:width="6.095cm" svg:height="1.396cm" svg:x="9.906cm" svg:y="11.303cm">
          <text:p text:style-name="P10"><text:span text:style-name="T12">Halves VRAM usage</text:span></text:p>
          <text:p text:style-name="P10"><text:span text:style-name="T12">Fits B3@300 in 4G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1" draw:text-style-name="P12" draw:layer="layout" svg:width="7.365cm" svg:height="4.698cm" svg:x="17.145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5" draw:text-style-name="P14" draw:layer="layout" svg:width="0.151cm" svg:height="4.698cm" svg:x="17.145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4" draw:text-style-name="P1" draw:layer="layout" svg:width="1.269cm" svg:height="1.269cm" svg:x="17.78cm" svg:y="8.89cm">
          <draw:image xlink:href="Pictures/100000010000010000000100542179C8.png" xlink:type="simple" xlink:show="embed" xlink:actuate="onLoad" draw:mime-type="image/png">
            <text:p/>
          </draw:image>
          <svg:desc>preencoded.png</svg:desc>
        </draw:frame>
        <draw:custom-shape draw:name="Text 23" draw:style-name="gr170" draw:text-style-name="P11" draw:layer="layout" svg:width="6.095cm" svg:height="0.888cm" svg:x="17.78cm" svg:y="10.363cm">
          <text:p text:style-name="P10"><text:span text:style-name="T40">Phase Checkpoin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71" draw:text-style-name="P11" draw:layer="layout" svg:width="6.095cm" svg:height="1.396cm" svg:x="17.78cm" svg:y="11.303cm">
          <text:p text:style-name="P10"><text:span text:style-name="T12">Every phase saves independently</text:span></text:p>
          <text:p text:style-name="P10"><text:span text:style-name="T12">Never lose training progr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8" presentation:class="page"/>
          <draw:frame draw:name="Notes Placeholder 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9" draw:style-name="dp10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172" draw:text-style-name="P11" draw:layer="layout" svg:width="20.319cm" svg:height="1.523cm" svg:x="1.778cm" svg:y="0.889cm">
          <text:p text:style-name="P10"><text:span text:style-name="T6">Resul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10.159cm" svg:height="6.603cm" svg:x="1.778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523cm" svg:height="1.523cm" svg:x="5.969cm" svg:y="3.683cm">
          <draw:image xlink:href="Pictures/100000010000010000000100C1E81E21.png" xlink:type="simple" xlink:show="embed" xlink:actuate="onLoad" draw:mime-type="image/png">
            <text:p/>
          </draw:image>
          <svg:desc>preencoded.png</svg:desc>
        </draw:frame>
        <draw:custom-shape draw:name="Text 2" draw:style-name="gr173" draw:text-style-name="P5" draw:layer="layout" svg:width="10.159cm" svg:height="2.539cm" svg:x="1.778cm" svg:y="5.207cm">
          <text:p text:style-name="P4"><text:span text:style-name="T41">9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74" draw:text-style-name="P5" draw:layer="layout" svg:width="10.159cm" svg:height="1.015cm" svg:x="1.778cm" svg:y="7.62cm">
          <text:p text:style-name="P4"><text:span text:style-name="T4">Validation Accuracy (with TTA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77" draw:text-style-name="P12" draw:layer="layout" svg:width="10.667cm" svg:height="0.913cm" svg:x="12.954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75" draw:text-style-name="P11" draw:layer="layout" svg:width="5.079cm" svg:height="0.913cm" svg:x="13.208cm" svg:y="3.302cm">
          <text:p text:style-name="P10"><text:span text:style-name="T8">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76" draw:text-style-name="P11" draw:layer="layout" svg:width="5.079cm" svg:height="0.913cm" svg:x="18.288cm" svg:y="3.302cm">
          <text:p text:style-name="P10"><text:span text:style-name="T42">EfficientNetB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7" draw:layer="layout" svg:width="10.667cm" svg:height="0.913cm" svg:x="12.954cm" svg:y="4.2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7" draw:text-style-name="P11" draw:layer="layout" svg:width="5.079cm" svg:height="0.913cm" svg:x="13.208cm" svg:y="4.267cm">
          <text:p text:style-name="P10"><text:span text:style-name="T8">Input Siz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8" draw:text-style-name="P11" draw:layer="layout" svg:width="5.079cm" svg:height="0.913cm" svg:x="18.288cm" svg:y="4.267cm">
          <text:p text:style-name="P10"><text:span text:style-name="T42">300×3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77" draw:text-style-name="P12" draw:layer="layout" svg:width="10.667cm" svg:height="0.913cm" svg:x="12.954cm" svg:y="5.2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79" draw:text-style-name="P11" draw:layer="layout" svg:width="5.079cm" svg:height="0.913cm" svg:x="13.208cm" svg:y="5.232cm">
          <text:p text:style-name="P10"><text:span text:style-name="T8">Training Pha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80" draw:text-style-name="P11" draw:layer="layout" svg:width="5.079cm" svg:height="0.913cm" svg:x="18.288cm" svg:y="5.232cm">
          <text:p text:style-name="P10"><text:span text:style-name="T42">3 (progressiv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17" draw:layer="layout" svg:width="10.667cm" svg:height="0.913cm" svg:x="12.954cm" svg:y="6.1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81" draw:text-style-name="P11" draw:layer="layout" svg:width="5.079cm" svg:height="0.913cm" svg:x="13.208cm" svg:y="6.198cm">
          <text:p text:style-name="P10"><text:span text:style-name="T8">GP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82" draw:text-style-name="P11" draw:layer="layout" svg:width="5.079cm" svg:height="0.913cm" svg:x="18.288cm" svg:y="6.198cm">
          <text:p text:style-name="P10"><text:span text:style-name="T42">RTX 3050 (4GB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77" draw:text-style-name="P12" draw:layer="layout" svg:width="10.667cm" svg:height="0.913cm" svg:x="12.954cm" svg:y="7.1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83" draw:text-style-name="P11" draw:layer="layout" svg:width="5.079cm" svg:height="0.913cm" svg:x="13.208cm" svg:y="7.163cm">
          <text:p text:style-name="P10"><text:span text:style-name="T8">Phase 1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84" draw:text-style-name="P11" draw:layer="layout" svg:width="5.079cm" svg:height="0.913cm" svg:x="18.288cm" svg:y="7.163cm">
          <text:p text:style-name="P10"><text:span text:style-name="T42">~8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1" draw:text-style-name="P17" draw:layer="layout" svg:width="10.667cm" svg:height="0.913cm" svg:x="12.954cm" svg:y="8.12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85" draw:text-style-name="P11" draw:layer="layout" svg:width="5.079cm" svg:height="0.913cm" svg:x="13.208cm" svg:y="8.128cm">
          <text:p text:style-name="P10"><text:span text:style-name="T8">Phase 2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86" draw:text-style-name="P11" draw:layer="layout" svg:width="5.079cm" svg:height="0.913cm" svg:x="18.288cm" svg:y="8.128cm">
          <text:p text:style-name="P10"><text:span text:style-name="T42">~96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77" draw:text-style-name="P12" draw:layer="layout" svg:width="10.667cm" svg:height="0.913cm" svg:x="12.954cm" svg:y="9.09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87" draw:text-style-name="P11" draw:layer="layout" svg:width="5.079cm" svg:height="0.913cm" svg:x="13.208cm" svg:y="9.093cm">
          <text:p text:style-name="P10"><text:span text:style-name="T8">Phase 3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88" draw:text-style-name="P11" draw:layer="layout" svg:width="5.079cm" svg:height="0.913cm" svg:x="18.288cm" svg:y="9.093cm">
          <text:p text:style-name="P10"><text:span text:style-name="T42">~9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1" draw:text-style-name="P17" draw:layer="layout" svg:width="10.667cm" svg:height="0.913cm" svg:x="12.954cm" svg:y="10.0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89" draw:text-style-name="P11" draw:layer="layout" svg:width="5.079cm" svg:height="0.913cm" svg:x="13.208cm" svg:y="10.058cm">
          <text:p text:style-name="P10"><text:span text:style-name="T8">TTA Boo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90" draw:text-style-name="P11" draw:layer="layout" svg:width="5.079cm" svg:height="0.913cm" svg:x="18.288cm" svg:y="10.058cm">
          <text:p text:style-name="P10"><text:span text:style-name="T42">+1-2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91" draw:text-style-name="P11" draw:layer="layout" svg:width="10.159cm" svg:height="0.888cm" svg:x="1.778cm" svg:y="10.414cm">
          <text:p text:style-name="P10"><text:span text:style-name="T40">Accuracy Journ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1" draw:text-style-name="P17" draw:layer="layout" svg:width="21.843cm" svg:height="0.634cm" svg:x="1.778cm" svg:y="11.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2" draw:text-style-name="P13" draw:layer="layout" svg:width="7.111cm" svg:height="0.634cm" svg:x="1.778cm" svg:y="11.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4" draw:text-style-name="P19" draw:layer="layout" svg:width="7.111cm" svg:height="0.634cm" svg:x="8.89cm" svg:y="11.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5" draw:text-style-name="P14" draw:layer="layout" svg:width="7.619cm" svg:height="0.634cm" svg:x="16.002cm" svg:y="11.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92" draw:text-style-name="P5" draw:layer="layout" svg:width="7.111cm" svg:height="0.761cm" svg:x="1.778cm" svg:y="12.192cm">
          <text:p text:style-name="P4"><text:span text:style-name="T32">Phase 1 → 8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93" draw:text-style-name="P5" draw:layer="layout" svg:width="7.111cm" svg:height="0.761cm" svg:x="8.89cm" svg:y="12.192cm">
          <text:p text:style-name="P4"><text:span text:style-name="T36">Phase 2 → 96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94" draw:text-style-name="P5" draw:layer="layout" svg:width="7.619cm" svg:height="0.761cm" svg:x="16.002cm" svg:y="12.192cm">
          <text:p text:style-name="P4"><text:span text:style-name="T39">Phase 3 → 9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9" presentation:class="page"/>
          <draw:frame draw:name="Notes Placeholder 2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0" draw:style-name="dp11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195" draw:text-style-name="P11" draw:layer="layout" svg:width="20.319cm" svg:height="1.523cm" svg:x="1.778cm" svg:y="0.889cm">
          <text:p text:style-name="P10"><text:span text:style-name="T6">Lessons Learn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21.843cm" svg:height="1.65cm" svg:x="1.778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2" draw:text-style-name="P13" draw:layer="layout" svg:width="0.151cm" svg:height="1.65cm" svg:x="1.778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142cm" svg:height="1.142cm" svg:x="2.54cm" svg:y="3.429cm">
          <draw:image xlink:href="Pictures/100000010000010000000100B03B6B68.png" xlink:type="simple" xlink:show="embed" xlink:actuate="onLoad" draw:mime-type="image/png">
            <text:p/>
          </draw:image>
          <svg:desc>preencoded.png</svg:desc>
        </draw:frame>
        <draw:custom-shape draw:name="Text 3" draw:style-name="gr196" draw:text-style-name="P11" draw:layer="layout" svg:width="18.795cm" svg:height="1.65cm" svg:x="4.191cm" svg:y="3.175cm">
          <text:p text:style-name="P10"><text:span text:style-name="T43">Preprocessing pipeline order is critical for transfer lear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1" draw:text-style-name="P12" draw:layer="layout" svg:width="21.843cm" svg:height="1.65cm" svg:x="1.778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5" draw:text-style-name="P14" draw:layer="layout" svg:width="0.151cm" svg:height="1.65cm" svg:x="1.778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1.142cm" svg:height="1.142cm" svg:x="2.54cm" svg:y="5.461cm">
          <draw:image xlink:href="Pictures/100000010000010000000100541F4388.png" xlink:type="simple" xlink:show="embed" xlink:actuate="onLoad" draw:mime-type="image/png">
            <text:p/>
          </draw:image>
          <svg:desc>preencoded.png</svg:desc>
        </draw:frame>
        <draw:custom-shape draw:name="Text 6" draw:style-name="gr197" draw:text-style-name="P11" draw:layer="layout" svg:width="18.795cm" svg:height="1.65cm" svg:x="4.191cm" svg:y="5.207cm">
          <text:p text:style-name="P10"><text:span text:style-name="T43">Minimal classifier heads outperform over-regularized 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1" draw:text-style-name="P12" draw:layer="layout" svg:width="21.843cm" svg:height="1.65cm" svg:x="1.778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4" draw:text-style-name="P19" draw:layer="layout" svg:width="0.151cm" svg:height="1.65cm" svg:x="1.778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1" draw:layer="layout" svg:width="1.142cm" svg:height="1.142cm" svg:x="2.54cm" svg:y="7.493cm">
          <draw:image xlink:href="Pictures/100000010000010000000100AB9FDB8E.png" xlink:type="simple" xlink:show="embed" xlink:actuate="onLoad" draw:mime-type="image/png">
            <text:p/>
          </draw:image>
          <svg:desc>preencoded.png</svg:desc>
        </draw:frame>
        <draw:custom-shape draw:name="Text 9" draw:style-name="gr198" draw:text-style-name="P11" draw:layer="layout" svg:width="18.795cm" svg:height="1.65cm" svg:x="4.191cm" svg:y="7.239cm">
          <text:p text:style-name="P10"><text:span text:style-name="T43">Progressive unfreezing beats unfreeze-all-at-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1" draw:text-style-name="P12" draw:layer="layout" svg:width="21.843cm" svg:height="1.65cm" svg:x="1.778cm" svg:y="9.27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8" draw:text-style-name="P15" draw:layer="layout" svg:width="0.151cm" svg:height="1.65cm" svg:x="1.778cm" svg:y="9.27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1" draw:layer="layout" svg:width="1.142cm" svg:height="1.142cm" svg:x="2.54cm" svg:y="9.525cm">
          <draw:image xlink:href="Pictures/100000010000010000000100542179C8.png" xlink:type="simple" xlink:show="embed" xlink:actuate="onLoad" draw:mime-type="image/png">
            <text:p/>
          </draw:image>
          <svg:desc>preencoded.png</svg:desc>
        </draw:frame>
        <draw:custom-shape draw:name="Text 12" draw:style-name="gr199" draw:text-style-name="P11" draw:layer="layout" svg:width="18.795cm" svg:height="1.65cm" svg:x="4.191cm" svg:y="9.271cm">
          <text:p text:style-name="P10"><text:span text:style-name="T43">Always save checkpoints after each training ph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" draw:text-style-name="P12" draw:layer="layout" svg:width="21.843cm" svg:height="1.65cm" svg:x="1.778cm" svg:y="11.3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65" draw:text-style-name="P32" draw:layer="layout" svg:width="0.151cm" svg:height="1.65cm" svg:x="1.778cm" svg:y="11.3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" draw:text-style-name="P1" draw:layer="layout" svg:width="1.142cm" svg:height="1.142cm" svg:x="2.54cm" svg:y="11.557cm">
          <draw:image xlink:href="Pictures/1000000100000100000001007A1D978B.png" xlink:type="simple" xlink:show="embed" xlink:actuate="onLoad" draw:mime-type="image/png">
            <text:p/>
          </draw:image>
          <svg:desc>preencoded.png</svg:desc>
        </draw:frame>
        <draw:custom-shape draw:name="Text 15" draw:style-name="gr200" draw:text-style-name="P11" draw:layer="layout" svg:width="18.795cm" svg:height="1.65cm" svg:x="4.191cm" svg:y="11.303cm">
          <text:p text:style-name="P10"><text:span text:style-name="T43">Hardware constraints force better engineering decis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0" presentation:class="page"/>
          <draw:frame draw:name="Notes Placeholder 2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1" draw:style-name="dp12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Text 0" draw:style-name="gr201" draw:text-style-name="P11" draw:layer="layout" svg:width="20.319cm" svg:height="1.523cm" svg:x="1.778cm" svg:y="0.889cm">
          <text:p text:style-name="P10"><text:span text:style-name="T6">Future Sco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6.349cm" svg:height="0.101cm" svg:x="1.778cm" svg:y="2.413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Shape 1" draw:style-name="gr11" draw:text-style-name="P12" draw:layer="layout" svg:width="10.413cm" svg:height="4.571cm" svg:x="1.778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2" draw:text-style-name="P13" draw:layer="layout" svg:width="10.413cm" svg:height="0.151cm" svg:x="1.778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396cm" svg:height="1.396cm" svg:x="2.413cm" svg:y="3.81cm">
          <draw:image xlink:href="Pictures/10000001000001000000010035C63A27.png" xlink:type="simple" xlink:show="embed" xlink:actuate="onLoad" draw:mime-type="image/png">
            <text:p/>
          </draw:image>
          <svg:desc>preencoded.png</svg:desc>
        </draw:frame>
        <draw:custom-shape draw:name="Text 3" draw:style-name="gr202" draw:text-style-name="P11" draw:layer="layout" svg:width="7.365cm" svg:height="0.888cm" svg:x="4.318cm" svg:y="3.81cm">
          <text:p text:style-name="P10"><text:span text:style-name="T44">Model Ensemb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03" draw:text-style-name="P11" draw:layer="layout" svg:width="7.365cm" svg:height="2.031cm" svg:x="4.318cm" svg:y="4.826cm">
          <text:p text:style-name="P10"><text:span text:style-name="T8">Average predictions from EfficientNetB3 + ResNet50 for robust classif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1" draw:text-style-name="P12" draw:layer="layout" svg:width="10.413cm" svg:height="4.571cm" svg:x="12.95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5" draw:text-style-name="P14" draw:layer="layout" svg:width="10.413cm" svg:height="0.151cm" svg:x="12.95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1" draw:layer="layout" svg:width="1.396cm" svg:height="1.396cm" svg:x="13.589cm" svg:y="3.81cm">
          <draw:image xlink:href="Pictures/1000000100000100000001007440A46E.png" xlink:type="simple" xlink:show="embed" xlink:actuate="onLoad" draw:mime-type="image/png">
            <text:p/>
          </draw:image>
          <svg:desc>preencoded.png</svg:desc>
        </draw:frame>
        <draw:custom-shape draw:name="Text 7" draw:style-name="gr204" draw:text-style-name="P11" draw:layer="layout" svg:width="7.365cm" svg:height="0.888cm" svg:x="15.494cm" svg:y="3.81cm">
          <text:p text:style-name="P10"><text:span text:style-name="T44">EfficientNetV2-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5" draw:text-style-name="P11" draw:layer="layout" svg:width="7.365cm" svg:height="2.031cm" svg:x="15.494cm" svg:y="4.826cm">
          <text:p text:style-name="P10"><text:span text:style-name="T8">Improved architecture with faster training and better accuracy cei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1" draw:text-style-name="P12" draw:layer="layout" svg:width="10.413cm" svg:height="4.571cm" svg:x="1.778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4" draw:text-style-name="P19" draw:layer="layout" svg:width="10.413cm" svg:height="0.151cm" svg:x="1.778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1" draw:layer="layout" svg:width="1.396cm" svg:height="1.396cm" svg:x="2.413cm" svg:y="9.017cm">
          <draw:image xlink:href="Pictures/1000000100000100000001000234FCF6.png" xlink:type="simple" xlink:show="embed" xlink:actuate="onLoad" draw:mime-type="image/png">
            <text:p/>
          </draw:image>
          <svg:desc>preencoded.png</svg:desc>
        </draw:frame>
        <draw:custom-shape draw:name="Text 11" draw:style-name="gr206" draw:text-style-name="P11" draw:layer="layout" svg:width="7.365cm" svg:height="0.888cm" svg:x="4.318cm" svg:y="9.017cm">
          <text:p text:style-name="P10"><text:span text:style-name="T44">Higher Resolu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07" draw:text-style-name="P11" draw:layer="layout" svg:width="7.365cm" svg:height="2.031cm" svg:x="4.318cm" svg:y="10.033cm">
          <text:p text:style-name="P10"><text:span text:style-name="T8">Increase to 380×380 pixels for finer disease texture dete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" draw:text-style-name="P12" draw:layer="layout" svg:width="10.413cm" svg:height="4.571cm" svg:x="12.954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8" draw:text-style-name="P15" draw:layer="layout" svg:width="10.413cm" svg:height="0.151cm" svg:x="12.954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1" draw:layer="layout" svg:width="1.396cm" svg:height="1.396cm" svg:x="13.589cm" svg:y="9.017cm">
          <draw:image xlink:href="Pictures/100000010000010000000100E0EB5BCF.png" xlink:type="simple" xlink:show="embed" xlink:actuate="onLoad" draw:mime-type="image/png">
            <text:p/>
          </draw:image>
          <svg:desc>preencoded.png</svg:desc>
        </draw:frame>
        <draw:custom-shape draw:name="Text 15" draw:style-name="gr208" draw:text-style-name="P11" draw:layer="layout" svg:width="7.365cm" svg:height="0.888cm" svg:x="15.494cm" svg:y="9.017cm">
          <text:p text:style-name="P10"><text:span text:style-name="T44">Mobile Deploym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09" draw:text-style-name="P11" draw:layer="layout" svg:width="7.365cm" svg:height="2.031cm" svg:x="15.494cm" svg:y="10.033cm">
          <text:p text:style-name="P10"><text:span text:style-name="T8">Convert to TFLite and deploy as mobile app for real-world farmer u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1" presentation:class="page"/>
          <draw:frame draw:name="Notes Placeholder 2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2" draw:style-name="dp13" draw:master-page-name="DEFAULT">
        <office:forms form:automatic-focus="false" form:apply-design-mode="false"/>
        <draw:custom-shape draw:name="Shape 0" draw:style-name="gr12" draw:text-style-name="P13" draw:layer="layout" svg:width="25.399cm" svg:height="0.10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1" draw:layer="layout" svg:width="1.777cm" svg:height="1.777cm" svg:x="11.43cm" svg:y="2.54cm">
          <draw:image xlink:href="Pictures/100000010000010000000100BD203286.png" xlink:type="simple" xlink:show="embed" xlink:actuate="onLoad" draw:mime-type="image/png">
            <text:p/>
          </draw:image>
          <svg:desc>preencoded.png</svg:desc>
        </draw:frame>
        <draw:custom-shape draw:name="Text 1" draw:style-name="gr210" draw:text-style-name="P5" draw:layer="layout" svg:width="22.859cm" svg:height="1.777cm" svg:x="1.27cm" svg:y="4.699cm">
          <text:p text:style-name="P4"><text:span text:style-name="T1">TEST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1" draw:text-style-name="P5" draw:layer="layout" svg:width="22.859cm" svg:height="1.269cm" svg:x="1.27cm" svg:y="6.477cm">
          <text:p text:style-name="P4"><text:span text:style-name="T45">Kaggle Paddy Disease Classification — 3,469 Unlabeled Test Im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2" draw:text-style-name="P12" draw:layer="layout" svg:width="5.333cm" svg:height="3.301cm" svg:x="1.27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13" draw:text-style-name="P5" draw:layer="layout" svg:width="5.333cm" svg:height="1.396cm" svg:x="1.27cm" svg:y="9.271cm">
          <text:p text:style-name="P4"><text:span text:style-name="T46">3,46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4" draw:text-style-name="P5" draw:layer="layout" svg:width="5.333cm" svg:height="1.015cm" svg:x="1.27cm" svg:y="10.795cm">
          <text:p text:style-name="P4"><text:span text:style-name="T8">Test Im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12" draw:text-style-name="P12" draw:layer="layout" svg:width="5.333cm" svg:height="3.301cm" svg:x="7.239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5" draw:text-style-name="P5" draw:layer="layout" svg:width="5.333cm" svg:height="1.396cm" svg:x="7.239cm" svg:y="9.271cm">
          <text:p text:style-name="P4"><text:span text:style-name="T19">EfficientNetB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6" draw:text-style-name="P5" draw:layer="layout" svg:width="5.333cm" svg:height="1.015cm" svg:x="7.239cm" svg:y="10.795cm">
          <text:p text:style-name="P4"><text:span text:style-name="T8">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12" draw:text-style-name="P12" draw:layer="layout" svg:width="5.333cm" svg:height="3.301cm" svg:x="13.208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7" draw:text-style-name="P5" draw:layer="layout" svg:width="5.333cm" svg:height="1.396cm" svg:x="13.208cm" svg:y="9.271cm">
          <text:p text:style-name="P4"><text:span text:style-name="T47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8" draw:text-style-name="P5" draw:layer="layout" svg:width="5.333cm" svg:height="1.015cm" svg:x="13.208cm" svg:y="10.795cm">
          <text:p text:style-name="P4"><text:span text:style-name="T8">TTA P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12" draw:text-style-name="P12" draw:layer="layout" svg:width="5.333cm" svg:height="3.301cm" svg:x="19.177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19" draw:text-style-name="P5" draw:layer="layout" svg:width="5.333cm" svg:height="1.396cm" svg:x="19.177cm" svg:y="9.271cm">
          <text:p text:style-name="P4"><text:span text:style-name="T48">99.4% agre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20" draw:text-style-name="P5" draw:layer="layout" svg:width="5.333cm" svg:height="1.015cm" svg:x="19.177cm" svg:y="10.795cm">
          <text:p text:style-name="P4"><text:span text:style-name="T8">Normal vs T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4">
          <draw:page-thumbnail draw:style-name="gr9" draw:layer="layout" svg:width="18.624cm" svg:height="10.476cm" svg:x="1.482cm" svg:y="2.123cm" draw:page-number="12" presentation:class="page"/>
          <draw:frame presentation:style-name="pr1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DEFAULT">
        <office:forms form:automatic-focus="false" form:apply-design-mode="false"/>
        <draw:custom-shape draw:name="Shape 0" draw:style-name="gr12" draw:text-style-name="P13" draw:layer="layout" svg:width="25.399cm" svg:height="0.10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1" draw:text-style-name="P11" draw:layer="layout" svg:width="22.859cm" svg:height="1.396cm" svg:x="1.27cm" svg:y="0.635cm">
          <text:p text:style-name="P10"><text:span text:style-name="T49">Prediction Distribu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2" draw:text-style-name="P11" draw:layer="layout" svg:width="22.859cm" svg:height="0.888cm" svg:x="1.27cm" svg:y="1.905cm">
          <text:p text:style-name="P10"><text:span text:style-name="T4">Normal Inference vs Test-Time Augmentation on 3,469 im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223" draw:text-style-name="P1" draw:layer="layout" svg:width="23.875cm" svg:height="10.159cm" svg:x="0.762cm" svg:y="3.0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 3" draw:style-name="gr224" draw:text-style-name="P5" draw:layer="layout" svg:width="22.859cm" svg:height="0.761cm" svg:x="1.27cm" svg:y="13.208cm">
          <text:p text:style-name="P4"><text:span text:style-name="T50">Normal vs TTA agreement: 3,448 / 3,469 images (99.4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4">
          <draw:page-thumbnail draw:style-name="gr9" draw:layer="layout" svg:width="18.624cm" svg:height="10.476cm" svg:x="1.482cm" svg:y="2.123cm" draw:page-number="13" presentation:class="page"/>
          <draw:frame presentation:style-name="pr1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3" draw:master-page-name="DEFAULT">
        <office:forms form:automatic-focus="false" form:apply-design-mode="false"/>
        <draw:custom-shape draw:name="Shape 0" draw:style-name="gr12" draw:text-style-name="P13" draw:layer="layout" svg:width="25.399cm" svg:height="0.10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5" draw:text-style-name="P11" draw:layer="layout" svg:width="15.239cm" svg:height="1.396cm" svg:x="1.27cm" svg:y="0.635cm">
          <text:p text:style-name="P10"><text:span text:style-name="T49">Sample Predic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6" draw:text-style-name="P11" draw:layer="layout" svg:width="22.859cm" svg:height="0.888cm" svg:x="1.27cm" svg:y="1.905cm">
          <text:p text:style-name="P10"><text:span text:style-name="T4">Top 10 test images with confidence sco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27" draw:layer="layout" svg:width="21.335cm" svg:height="9.778cm" svg:x="2.032cm" svg:y="3.175cm">
          <table:table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34"><text:span text:style-name="T51">Image</text:span></text:p>
              </table:table-cell>
              <table:table-cell>
                <text:p text:style-name="P34"><text:span text:style-name="T51">Predicted Class</text:span></text:p>
              </table:table-cell>
              <table:table-cell>
                <text:p text:style-name="P34"><text:span text:style-name="T51">Confidence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1.jpg</text:span></text:p>
              </table:table-cell>
              <table:table-cell>
                <text:p text:style-name="P34"><text:span text:style-name="T52">hispa</text:span></text:p>
              </table:table-cell>
              <table:table-cell>
                <text:p text:style-name="P34"><text:span text:style-name="T53">94.5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2.jpg</text:span></text:p>
              </table:table-cell>
              <table:table-cell>
                <text:p text:style-name="P34"><text:span text:style-name="T52">normal</text:span></text:p>
              </table:table-cell>
              <table:table-cell>
                <text:p text:style-name="P34"><text:span text:style-name="T53">92.3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3.jpg</text:span></text:p>
              </table:table-cell>
              <table:table-cell>
                <text:p text:style-name="P34"><text:span text:style-name="T52">blast</text:span></text:p>
              </table:table-cell>
              <table:table-cell>
                <text:p text:style-name="P34"><text:span text:style-name="T53">88.4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4.jpg</text:span></text:p>
              </table:table-cell>
              <table:table-cell>
                <text:p text:style-name="P34"><text:span text:style-name="T52">blast</text:span></text:p>
              </table:table-cell>
              <table:table-cell>
                <text:p text:style-name="P34"><text:span text:style-name="T53">94.2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5.jpg</text:span></text:p>
              </table:table-cell>
              <table:table-cell>
                <text:p text:style-name="P34"><text:span text:style-name="T52">blast</text:span></text:p>
              </table:table-cell>
              <table:table-cell>
                <text:p text:style-name="P34"><text:span text:style-name="T53">90.6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6.jpg</text:span></text:p>
              </table:table-cell>
              <table:table-cell>
                <text:p text:style-name="P34"><text:span text:style-name="T52">brown_spot</text:span></text:p>
              </table:table-cell>
              <table:table-cell>
                <text:p text:style-name="P34"><text:span text:style-name="T53">85.3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7.jpg</text:span></text:p>
              </table:table-cell>
              <table:table-cell>
                <text:p text:style-name="P34"><text:span text:style-name="T52">dead_heart</text:span></text:p>
              </table:table-cell>
              <table:table-cell>
                <text:p text:style-name="P34"><text:span text:style-name="T53">90.9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8.jpg</text:span></text:p>
              </table:table-cell>
              <table:table-cell>
                <text:p text:style-name="P34"><text:span text:style-name="T52">brown_spot</text:span></text:p>
              </table:table-cell>
              <table:table-cell>
                <text:p text:style-name="P34"><text:span text:style-name="T53">86.6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09.jpg</text:span></text:p>
              </table:table-cell>
              <table:table-cell>
                <text:p text:style-name="P34"><text:span text:style-name="T52">hispa</text:span></text:p>
              </table:table-cell>
              <table:table-cell>
                <text:p text:style-name="P34"><text:span text:style-name="T53">87.8%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2">200010.jpg</text:span></text:p>
              </table:table-cell>
              <table:table-cell>
                <text:p text:style-name="P34"><text:span text:style-name="T52">normal</text:span></text:p>
              </table:table-cell>
              <table:table-cell>
                <text:p text:style-name="P34"><text:span text:style-name="T53">93.3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3" draw:style-name="gr212" draw:text-style-name="P12" draw:layer="layout" svg:width="21.335cm" svg:height="1.269cm" svg:x="2.032cm" svg:y="12.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1" draw:layer="layout" svg:width="0.761cm" svg:height="0.761cm" svg:x="2.54cm" svg:y="12.903cm">
          <draw:image xlink:href="Pictures/10000001000001000000010093A406A4.png" xlink:type="simple" xlink:show="embed" xlink:actuate="onLoad" draw:mime-type="image/png">
            <text:p/>
          </draw:image>
          <svg:desc>preencoded.png</svg:desc>
        </draw:frame>
        <draw:custom-shape draw:name="Text 4" draw:style-name="gr228" draw:text-style-name="P11" draw:layer="layout" svg:width="19.303cm" svg:height="1.269cm" svg:x="3.556cm" svg:y="12.7cm">
          <text:p text:style-name="P10"><text:span text:style-name="T54">Average confidence: 90.4% — model is confident and consistent across disease 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4">
          <draw:page-thumbnail draw:style-name="gr9" draw:layer="layout" svg:width="18.624cm" svg:height="10.476cm" svg:x="1.482cm" svg:y="2.123cm" draw:page-number="14" presentation:class="page"/>
          <draw:frame presentation:style-name="pr1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3" draw:master-page-name="DEFAULT">
        <office:forms form:automatic-focus="false" form:apply-design-mode="false"/>
        <draw:custom-shape draw:name="Shape 0" draw:style-name="gr12" draw:text-style-name="P13" draw:layer="layout" svg:width="25.399cm" svg:height="0.10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9" draw:text-style-name="P11" draw:layer="layout" svg:width="22.859cm" svg:height="1.396cm" svg:x="1.27cm" svg:y="0.635cm">
          <text:p text:style-name="P10"><text:span text:style-name="T49">Test-Time Augmentation Strateg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0" draw:text-style-name="P11" draw:layer="layout" svg:width="22.859cm" svg:height="0.888cm" svg:x="1.27cm" svg:y="1.905cm">
          <text:p text:style-name="P10"><text:span text:style-name="T4">5-pass inference with multi-strategy augmentation for robust predic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2" draw:text-style-name="P12" draw:layer="layout" svg:width="7.365cm" svg:height="7.619cm" svg:x="1.27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1" draw:layer="layout" svg:width="1.269cm" svg:height="1.269cm" svg:x="4.064cm" svg:y="3.937cm">
          <draw:image xlink:href="Pictures/10000001000001000000010096DD768A.png" xlink:type="simple" xlink:show="embed" xlink:actuate="onLoad" draw:mime-type="image/png">
            <text:p/>
          </draw:image>
          <svg:desc>preencoded.png</svg:desc>
        </draw:frame>
        <draw:custom-shape draw:name="Text 4" draw:style-name="gr231" draw:text-style-name="P5" draw:layer="layout" svg:width="7.365cm" svg:height="1.015cm" svg:x="1.27cm" svg:y="5.461cm">
          <text:p text:style-name="P4"><text:span text:style-name="T55">Clean P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32" draw:text-style-name="P35" draw:layer="layout" svg:width="3.809cm" svg:height="0.761cm" svg:x="3.048cm" svg:y="6.477cm">
          <text:p text:style-name="P4"><text:span text:style-name="T56">2 p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3" draw:text-style-name="P37" draw:layer="layout" svg:width="6.349cm" svg:height="3.047cm" svg:x="1.778cm" svg:y="7.62cm">
          <text:p text:style-name="P36"><text:span text:style-name="T8">No augmentation</text:span></text:p>
          <text:p text:style-name="P36"><text:span text:style-name="T8">Stable baseline predictions</text:span></text:p>
          <text:p text:style-name="P36"><text:span text:style-name="T8">Direct model outp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2" draw:text-style-name="P12" draw:layer="layout" svg:width="7.365cm" svg:height="7.619cm" svg:x="9.271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1.269cm" svg:height="1.269cm" svg:x="12.065cm" svg:y="3.937cm">
          <draw:image xlink:href="Pictures/1000000100000100000001005AEE8E6A.png" xlink:type="simple" xlink:show="embed" xlink:actuate="onLoad" draw:mime-type="image/png">
            <text:p/>
          </draw:image>
          <svg:desc>preencoded.png</svg:desc>
        </draw:frame>
        <draw:custom-shape draw:name="Text 8" draw:style-name="gr234" draw:text-style-name="P5" draw:layer="layout" svg:width="7.365cm" svg:height="1.015cm" svg:x="9.271cm" svg:y="5.461cm">
          <text:p text:style-name="P4"><text:span text:style-name="T57">Strong Augmen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35" draw:text-style-name="P38" draw:layer="layout" svg:width="3.809cm" svg:height="0.761cm" svg:x="11.049cm" svg:y="6.477cm">
          <text:p text:style-name="P4"><text:span text:style-name="T56">2 p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36" draw:text-style-name="P37" draw:layer="layout" svg:width="6.349cm" svg:height="3.047cm" svg:x="9.779cm" svg:y="7.62cm">
          <text:p text:style-name="P36"><text:span text:style-name="T8">Random flip + brightness</text:span></text:p>
          <text:p text:style-name="P36"><text:span text:style-name="T8">Contrast + saturation shift</text:span></text:p>
          <text:p text:style-name="P36"><text:span text:style-name="T8">Hue variation (0.05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12" draw:text-style-name="P12" draw:layer="layout" svg:width="7.365cm" svg:height="7.619cm" svg:x="17.272cm" svg:y="3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.269cm" svg:height="1.269cm" svg:x="20.066cm" svg:y="3.937cm">
          <draw:image xlink:href="Pictures/1000000100000100000001000A86BA5C.png" xlink:type="simple" xlink:show="embed" xlink:actuate="onLoad" draw:mime-type="image/png">
            <text:p/>
          </draw:image>
          <svg:desc>preencoded.png</svg:desc>
        </draw:frame>
        <draw:custom-shape draw:name="Text 12" draw:style-name="gr237" draw:text-style-name="P5" draw:layer="layout" svg:width="7.365cm" svg:height="1.015cm" svg:x="17.272cm" svg:y="5.461cm">
          <text:p text:style-name="P4"><text:span text:style-name="T58">Multiscale Cr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38" draw:text-style-name="P39" draw:layer="layout" svg:width="3.809cm" svg:height="0.761cm" svg:x="19.05cm" svg:y="6.477cm">
          <text:p text:style-name="P4"><text:span text:style-name="T56">1 pa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9" draw:text-style-name="P37" draw:layer="layout" svg:width="6.349cm" svg:height="3.047cm" svg:x="17.78cm" svg:y="7.62cm">
          <text:p text:style-name="P36"><text:span text:style-name="T8">Resize to 340x340 first</text:span></text:p>
          <text:p text:style-name="P36"><text:span text:style-name="T8">Random crop to 300x300</text:span></text:p>
          <text:p text:style-name="P36"><text:span text:style-name="T8">Tests scale invari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12" draw:text-style-name="P12" draw:layer="layout" svg:width="22.859cm" svg:height="2.031cm" svg:x="1.27cm" svg:y="11.6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40" draw:text-style-name="P5" draw:layer="layout" svg:width="6.857cm" svg:height="1.015cm" svg:x="1.778cm" svg:y="11.811cm">
          <text:p text:style-name="P4"><text:span text:style-name="T37">99.4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41" draw:text-style-name="P5" draw:layer="layout" svg:width="6.857cm" svg:height="0.761cm" svg:x="1.778cm" svg:y="12.7cm">
          <text:p text:style-name="P4"><text:span text:style-name="T12">Agreement R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42" draw:text-style-name="P5" draw:layer="layout" svg:width="6.857cm" svg:height="1.015cm" svg:x="9.652cm" svg:y="11.811cm">
          <text:p text:style-name="P4"><text:span text:style-name="T59">21 / 3,46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43" draw:text-style-name="P5" draw:layer="layout" svg:width="6.857cm" svg:height="0.761cm" svg:x="9.652cm" svg:y="12.7cm">
          <text:p text:style-name="P4"><text:span text:style-name="T12">Changed Predic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44" draw:text-style-name="P5" draw:layer="layout" svg:width="6.857cm" svg:height="1.015cm" svg:x="17.526cm" svg:y="11.811cm">
          <text:p text:style-name="P4"><text:span text:style-name="T28">Average all 5 p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45" draw:text-style-name="P5" draw:layer="layout" svg:width="6.857cm" svg:height="0.761cm" svg:x="17.526cm" svg:y="12.7cm">
          <text:p text:style-name="P4"><text:span text:style-name="T12">Strateg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4">
          <draw:page-thumbnail draw:style-name="gr9" draw:layer="layout" svg:width="18.624cm" svg:height="10.476cm" svg:x="1.482cm" svg:y="2.123cm" draw:page-number="15" presentation:class="page"/>
          <draw:frame presentation:style-name="pr1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3" draw:master-page-name="DEFAULT">
        <office:forms form:automatic-focus="false" form:apply-design-mode="false"/>
        <draw:custom-shape draw:name="Shape 0" draw:style-name="gr12" draw:text-style-name="P13" draw:layer="layout" svg:width="25.399cm" svg:height="0.10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46" draw:text-style-name="P11" draw:layer="layout" svg:width="22.859cm" svg:height="1.396cm" svg:x="1.27cm" svg:y="0.635cm">
          <text:p text:style-name="P10"><text:span text:style-name="T49">Validation vs Te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47" draw:text-style-name="P11" draw:layer="layout" svg:width="22.859cm" svg:height="0.888cm" svg:x="1.27cm" svg:y="1.905cm">
          <text:p text:style-name="P10"><text:span text:style-name="T4">Model performance across evaluation st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2" draw:text-style-name="P12" draw:layer="layout" svg:width="10.921cm" svg:height="9.651cm" svg:x="1.27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1" draw:layer="layout" svg:width="0.888cm" svg:height="0.888cm" svg:x="1.905cm" svg:y="3.81cm">
          <draw:image xlink:href="Pictures/10000001000001000000010093A406A4.png" xlink:type="simple" xlink:show="embed" xlink:actuate="onLoad" draw:mime-type="image/png">
            <text:p/>
          </draw:image>
          <svg:desc>preencoded.png</svg:desc>
        </draw:frame>
        <draw:custom-shape draw:name="Text 4" draw:style-name="gr248" draw:text-style-name="P11" draw:layer="layout" svg:width="8.635cm" svg:height="0.888cm" svg:x="3.048cm" svg:y="3.81cm">
          <text:p text:style-name="P10"><text:span text:style-name="T60">Validation Set (2,067 imag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49" draw:text-style-name="P11" draw:layer="layout" svg:width="5.587cm" svg:height="0.888cm" svg:x="2.159cm" svg:y="5.334cm">
          <text:p text:style-name="P10"><text:span text:style-name="T8">Standard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50" draw:text-style-name="P41" draw:layer="layout" svg:width="3.809cm" svg:height="0.888cm" svg:x="7.874cm" svg:y="5.334cm">
          <text:p text:style-name="P40"><text:span text:style-name="T61">97.44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51" draw:text-style-name="P11" draw:layer="layout" svg:width="5.587cm" svg:height="0.888cm" svg:x="2.159cm" svg:y="6.477cm">
          <text:p text:style-name="P10"><text:span text:style-name="T8">TTA Accur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52" draw:text-style-name="P41" draw:layer="layout" svg:width="3.809cm" svg:height="0.888cm" svg:x="7.874cm" svg:y="6.477cm">
          <text:p text:style-name="P40"><text:span text:style-name="T61">97.97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53" draw:text-style-name="P11" draw:layer="layout" svg:width="5.587cm" svg:height="0.888cm" svg:x="2.159cm" svg:y="7.62cm">
          <text:p text:style-name="P10"><text:span text:style-name="T8">TTA Boo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54" draw:text-style-name="P41" draw:layer="layout" svg:width="3.809cm" svg:height="0.888cm" svg:x="7.874cm" svg:y="7.62cm">
          <text:p text:style-name="P40"><text:span text:style-name="T61">+0.53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55" draw:text-style-name="P11" draw:layer="layout" svg:width="5.587cm" svg:height="0.888cm" svg:x="2.159cm" svg:y="8.763cm">
          <text:p text:style-name="P10"><text:span text:style-name="T8">Misclassifi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6" draw:text-style-name="P41" draw:layer="layout" svg:width="3.809cm" svg:height="0.888cm" svg:x="7.874cm" svg:y="8.763cm">
          <text:p text:style-name="P40"><text:span text:style-name="T61">42 / 2,06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57" draw:text-style-name="P11" draw:layer="layout" svg:width="5.587cm" svg:height="0.888cm" svg:x="2.159cm" svg:y="9.906cm">
          <text:p text:style-name="P10"><text:span text:style-name="T8">Best Cla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58" draw:text-style-name="P41" draw:layer="layout" svg:width="3.809cm" svg:height="0.888cm" svg:x="7.874cm" svg:y="9.906cm">
          <text:p text:style-name="P40"><text:span text:style-name="T61">dead_heart (100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59" draw:text-style-name="P11" draw:layer="layout" svg:width="5.587cm" svg:height="0.888cm" svg:x="2.159cm" svg:y="11.049cm">
          <text:p text:style-name="P10"><text:span text:style-name="T8">Weakest Cla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60" draw:text-style-name="P41" draw:layer="layout" svg:width="3.809cm" svg:height="0.888cm" svg:x="7.874cm" svg:y="11.049cm">
          <text:p text:style-name="P40"><text:span text:style-name="T61">downy_mildew (91.9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12" draw:text-style-name="P12" draw:layer="layout" svg:width="10.921cm" svg:height="9.651cm" svg:x="13.208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1" draw:layer="layout" svg:width="0.888cm" svg:height="0.888cm" svg:x="13.843cm" svg:y="3.81cm">
          <draw:image xlink:href="Pictures/100000010000010000000100E377BA3D.png" xlink:type="simple" xlink:show="embed" xlink:actuate="onLoad" draw:mime-type="image/png">
            <text:p/>
          </draw:image>
          <svg:desc>preencoded.png</svg:desc>
        </draw:frame>
        <draw:custom-shape draw:name="Text 18" draw:style-name="gr261" draw:text-style-name="P11" draw:layer="layout" svg:width="8.635cm" svg:height="0.888cm" svg:x="14.986cm" svg:y="3.81cm">
          <text:p text:style-name="P10"><text:span text:style-name="T62">Test (3,469 imag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62" draw:text-style-name="P11" draw:layer="layout" svg:width="5.587cm" svg:height="0.888cm" svg:x="14.097cm" svg:y="5.334cm">
          <text:p text:style-name="P10"><text:span text:style-name="T8">Total Predic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63" draw:text-style-name="P41" draw:layer="layout" svg:width="3.809cm" svg:height="0.888cm" svg:x="19.812cm" svg:y="5.334cm">
          <text:p text:style-name="P40"><text:span text:style-name="T61">3,46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64" draw:text-style-name="P11" draw:layer="layout" svg:width="5.587cm" svg:height="0.888cm" svg:x="14.097cm" svg:y="6.477cm">
          <text:p text:style-name="P10"><text:span text:style-name="T8">TTA Agreem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65" draw:text-style-name="P41" draw:layer="layout" svg:width="3.809cm" svg:height="0.888cm" svg:x="19.812cm" svg:y="6.477cm">
          <text:p text:style-name="P40"><text:span text:style-name="T61">99.4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66" draw:text-style-name="P11" draw:layer="layout" svg:width="5.587cm" svg:height="0.888cm" svg:x="14.097cm" svg:y="7.62cm">
          <text:p text:style-name="P10"><text:span text:style-name="T8">Avg Confide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67" draw:text-style-name="P41" draw:layer="layout" svg:width="3.809cm" svg:height="0.888cm" svg:x="19.812cm" svg:y="7.62cm">
          <text:p text:style-name="P40"><text:span text:style-name="T61">~90.4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68" draw:text-style-name="P11" draw:layer="layout" svg:width="5.587cm" svg:height="0.888cm" svg:x="14.097cm" svg:y="8.763cm">
          <text:p text:style-name="P10"><text:span text:style-name="T8">Most Predic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69" draw:text-style-name="P41" draw:layer="layout" svg:width="3.809cm" svg:height="0.888cm" svg:x="19.812cm" svg:y="8.763cm">
          <text:p text:style-name="P40"><text:span text:style-name="T61">blast (593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70" draw:text-style-name="P11" draw:layer="layout" svg:width="5.587cm" svg:height="0.888cm" svg:x="14.097cm" svg:y="9.906cm">
          <text:p text:style-name="P10"><text:span text:style-name="T8">Least Predic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71" draw:text-style-name="P41" draw:layer="layout" svg:width="3.809cm" svg:height="0.888cm" svg:x="19.812cm" svg:y="9.906cm">
          <text:p text:style-name="P40"><text:span text:style-name="T61">bact. panicle (112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72" draw:text-style-name="P11" draw:layer="layout" svg:width="5.587cm" svg:height="0.888cm" svg:x="14.097cm" svg:y="11.0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73" draw:text-style-name="P41" draw:layer="layout" svg:width="3.809cm" svg:height="0.888cm" svg:x="19.812cm" svg:y="11.0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74" draw:text-style-name="P5" draw:layer="layout" svg:width="22.859cm" svg:height="1.015cm" svg:x="1.27cm" svg:y="13.081cm">
          <text:p text:style-name="P4"><text:span text:style-name="T63">Model generalizes well: high confidence and consistent predictions across unseen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4">
          <draw:page-thumbnail draw:style-name="gr9" draw:layer="layout" svg:width="18.624cm" svg:height="10.476cm" svg:x="1.482cm" svg:y="2.123cm" draw:page-number="16" presentation:class="page"/>
          <draw:frame presentation:style-name="pr1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5" draw:master-page-name="DEFAULT">
        <office:forms form:automatic-focus="false" form:apply-design-mode="false"/>
        <draw:frame draw:name="Image 0" draw:style-name="gr1" draw:text-style-name="P1" draw:layer="layout" svg:width="25.399cm" svg:height="14.287cm" svg:x="0cm" svg:y="0cm">
          <draw:image xlink:href="Pictures/1000000100000780000004385AB9D59A.png" xlink:type="simple" xlink:show="embed" xlink:actuate="onLoad" draw:mime-type="image/png">
            <text:p/>
          </draw:image>
          <svg:desc>preencoded.png</svg:desc>
        </draw:frame>
        <draw:custom-shape draw:name="Shape 0" draw:style-name="gr275" draw:text-style-name="P42" draw:layer="layout" svg:width="20.319cm" svg:height="14.287cm" svg:x="2.54cm" svg:y="0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4" draw:text-style-name="P1" draw:layer="layout" svg:width="2.285cm" svg:height="2.285cm" svg:x="11.557cm" svg:y="2.54cm">
          <draw:image xlink:href="Pictures/100000010000010000000100E0EB5BCF.png" xlink:type="simple" xlink:show="embed" xlink:actuate="onLoad" draw:mime-type="image/png">
            <text:p/>
          </draw:image>
          <svg:desc>preencoded.png</svg:desc>
        </draw:frame>
        <draw:custom-shape draw:name="Text 1" draw:style-name="gr276" draw:text-style-name="P5" draw:layer="layout" svg:width="22.859cm" svg:height="2.285cm" svg:x="1.27cm" svg:y="5.08cm">
          <text:p text:style-name="P4"><text:span text:style-name="T64">Thank Yo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1" draw:layer="layout" svg:width="10.159cm" svg:height="0.126cm" svg:x="7.62cm" svg:y="7.62cm">
          <draw:image xlink:href="Pictures/100000010000025800000008FD70ED82.png" xlink:type="simple" xlink:show="embed" xlink:actuate="onLoad" draw:mime-type="image/png">
            <text:p/>
          </draw:image>
          <svg:desc>preencoded.png</svg:desc>
        </draw:frame>
        <draw:custom-shape draw:name="Text 2" draw:style-name="gr277" draw:text-style-name="P5" draw:layer="layout" svg:width="22.859cm" svg:height="1.269cm" svg:x="1.27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8" draw:text-style-name="P5" draw:layer="layout" svg:width="22.859cm" svg:height="1.015cm" svg:x="1.27cm" svg:y="10.92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7" presentation:class="page"/>
          <draw:frame draw:name="Notes Placeholder 2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modern" style:font-pitch="fixed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78000000438FB6C897A.png" xlink:type="simple" xlink:show="embed" xlink:actuate="onLoad"/>
    <draw:fill-image draw:name="msFillBitmap_20_10" draw:display-name="msFillBitmap 10" xlink:href="Pictures/100000010000078000000438A793D2F9.png" xlink:type="simple" xlink:show="embed" xlink:actuate="onLoad"/>
    <draw:fill-image draw:name="msFillBitmap_20_11" draw:display-name="msFillBitmap 11" xlink:href="Pictures/100000010000078000000438FB6C897A.png" xlink:type="simple" xlink:show="embed" xlink:actuate="onLoad"/>
    <draw:fill-image draw:name="msFillBitmap_20_12" draw:display-name="msFillBitmap 12" xlink:href="Pictures/100000010000078000000438FB6C897A.png" xlink:type="simple" xlink:show="embed" xlink:actuate="onLoad"/>
    <draw:fill-image draw:name="msFillBitmap_20_2" draw:display-name="msFillBitmap 2" xlink:href="Pictures/100000010000078000000438A793D2F9.png" xlink:type="simple" xlink:show="embed" xlink:actuate="onLoad"/>
    <draw:fill-image draw:name="msFillBitmap_20_3" draw:display-name="msFillBitmap 3" xlink:href="Pictures/100000010000078000000438FB6C897A.png" xlink:type="simple" xlink:show="embed" xlink:actuate="onLoad"/>
    <draw:fill-image draw:name="msFillBitmap_20_4" draw:display-name="msFillBitmap 4" xlink:href="Pictures/100000010000078000000438A793D2F9.png" xlink:type="simple" xlink:show="embed" xlink:actuate="onLoad"/>
    <draw:fill-image draw:name="msFillBitmap_20_5" draw:display-name="msFillBitmap 5" xlink:href="Pictures/100000010000078000000438FB6C897A.png" xlink:type="simple" xlink:show="embed" xlink:actuate="onLoad"/>
    <draw:fill-image draw:name="msFillBitmap_20_6" draw:display-name="msFillBitmap 6" xlink:href="Pictures/100000010000078000000438A793D2F9.png" xlink:type="simple" xlink:show="embed" xlink:actuate="onLoad"/>
    <draw:fill-image draw:name="msFillBitmap_20_7" draw:display-name="msFillBitmap 7" xlink:href="Pictures/100000010000078000000438FB6C897A.png" xlink:type="simple" xlink:show="embed" xlink:actuate="onLoad"/>
    <draw:fill-image draw:name="msFillBitmap_20_8" draw:display-name="msFillBitmap 8" xlink:href="Pictures/100000010000078000000438A793D2F9.png" xlink:type="simple" xlink:show="embed" xlink:actuate="onLoad"/>
    <draw:fill-image draw:name="msFillBitmap_20_9" draw:display-name="msFillBitmap 9" xlink:href="Pictures/100000010000078000000438FB6C89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addy Disease Classification Using Transfer Learning</dc:title>
    <dc:subject>PptxGenJS Presentation</dc:subject>
    <meta:initial-creator>IIT Madras Student</meta:initial-creator>
    <meta:editing-cycles>5</meta:editing-cycles>
    <meta:creation-date>2026-03-23T11:33:48</meta:creation-date>
    <dc:date>2026-04-07T19:35:42.244133600</dc:date>
    <meta:editing-duration>PT4H37M21S</meta:editing-duration>
    <meta:generator>LibreOffice/26.2.1.2$Windows_X86_64 LibreOffice_project/620$Build-2</meta:generator>
    <meta:document-statistic meta:object-count="516"/>
    <meta:user-defined meta:name="AppVersion">16.0000</meta:user-defined>
    <meta:user-defined meta:name="Company">PptxGenJS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-color="#1c2333"/>
    </style:style>
    <style:style style:name="ch2" style:family="chart">
      <style:chart-properties chart:auto-position="true"/>
      <style:graphic-properties draw:stroke="none" draw:fill="none" draw:fill-color="#d9d9d9"/>
      <style:text-properties fo:color="#8b949e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loext:external-data="ppt/embeddings/Microsoft_Excel_Worksheet1.xlsx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axis-label-position="outside-start" chart:tick-mark-position="at-axis"/>
      <style:graphic-properties svg:stroke-width="0.035cm" svg:stroke-color="#888888"/>
      <style:text-properties fo:color="#8b949e" style:text-position="0% 100%" fo:font-family="Arial"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inor-divisor="5" chart:gap-width="80" chart:reverse-direction="false" text:line-break="false" loext:try-staggering-first="false" chart:link-data-style-to-source="false" chart:axis-position="0" chart:tick-mark-position="at-axis"/>
      <style:graphic-properties svg:stroke-width="0.035cm" svg:stroke-color="#888888"/>
      <style:text-properties fo:color="#8b949e" style:text-position="0% 100%" fo:font-family="Arial" fo:font-size="9pt" style:font-size-asian="9pt" style:font-size-complex="9pt"/>
    </style:style>
    <style:style style:name="ch6" style:family="chart">
      <style:graphic-properties svg:stroke-width="0.018cm" svg:stroke-color="#2a3040"/>
    </style:style>
    <style:style style:name="ch7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00b4d8" fo:wrap-option="wrap"/>
      <style:text-properties fo:color="#000000" style:text-position="0% 100%" fo:font-family="Arial" fo:font-size="12pt" style:font-size-asian="12pt" style:font-size-complex="12pt"/>
    </style:style>
    <style:style style:name="ch8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00f5a0" fo:wrap-option="wrap"/>
      <style:text-properties fo:color="#000000" style:text-position="0% 100%" fo:font-family="Arial" fo:font-size="12pt" style:font-size-asian="12pt" style:font-size-complex="12pt"/>
    </style:style>
    <style:style style:name="ch9" style:family="chart">
      <style:graphic-properties draw:fill="solid" draw:fill-color="#1c2333"/>
    </style:style>
    <style:style style:name="ch10" style:family="chart">
      <style:graphic-properties draw:fill-color="#d9d9d9"/>
    </style:style>
  </office:automatic-styles>
  <office:body>
    <office:chart>
      <chart:chart svg:width="23.876cm" svg:height="10.16cm" xlink:href="." xlink:type="simple" chart:class="chart:bar" chart:style-name="ch1">
        <chart:legend chart:legend-position="top" svg:x="9.951cm" svg:y="0.185cm" style:legend-expansion="wide" chart:style-name="ch2"/>
        <chart:plot-area chart:style-name="ch3" svg:x="0.477cm" svg:y="0.949cm" svg:width="22.922cm" svg:height="9.008cm">
          <chart:coordinate-region svg:x="1.258cm" svg:y="1.13cm" svg:width="22.141cm" svg:height="8.21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TTA (5-pass)</text:p>
              </table:table-cell>
            </table:table-row>
          </table:table-header-rows>
          <table:table-rows>
            <table:table-row>
              <table:table-cell office:value-type="string">
                <text:p>BLB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BLS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BPB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Blast</text:p>
              </table:table-cell>
              <table:table-cell office:value-type="float" office:value="588">
                <text:p>58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BrSpot</text:p>
              </table:table-cell>
              <table:table-cell office:value-type="float" office:value="328">
                <text:p>32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DeadH</text:p>
              </table:table-cell>
              <table:table-cell office:value-type="float" office:value="482">
                <text:p>48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DnMld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Hispa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Tungro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